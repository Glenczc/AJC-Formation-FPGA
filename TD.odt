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ccb0" officeooo:paragraph-rsid="001cccb0" style:font-weight-asian="bold" style:font-weight-complex="bold"/>
    </style:style>
    <style:style style:name="P2" style:family="paragraph" style:parent-style-name="Standard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3" style:family="paragraph" style:parent-style-name="Standard">
      <style:paragraph-properties fo:text-align="left" style:justify-single-word="false"/>
      <style:text-properties fo:font-weight="bold" officeooo:rsid="001cccb0" officeooo:paragraph-rsid="001cccb0" style:font-weight-asian="bold" style:font-weight-complex="bold"/>
    </style:style>
    <style:style style:name="P4" style:family="paragraph" style:parent-style-name="Standard" style:list-style-name="L1">
      <style:paragraph-properties fo:text-align="left" style:justify-single-word="false"/>
      <style:text-properties fo:font-weight="normal" officeooo:rsid="00205515" officeooo:paragraph-rsid="00205515" style:font-weight-asian="normal" style:font-weight-complex="normal"/>
    </style:style>
    <style:style style:name="P5" style:family="paragraph" style:parent-style-name="Standard" style:list-style-name="L1">
      <style:paragraph-properties fo:text-align="left" style:justify-single-word="false"/>
      <style:text-properties fo:font-style="normal" fo:font-weight="normal" officeooo:rsid="00205515" officeooo:paragraph-rsid="00205515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left" style:justify-single-word="false"/>
      <style:text-properties fo:font-style="normal" fo:font-weight="normal" officeooo:rsid="002059b9" officeooo:paragraph-rsid="002059b9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paragraph-properties fo:text-align="left" style:justify-single-word="false"/>
      <style:text-properties fo:font-weight="normal" officeooo:rsid="002059b9" officeooo:paragraph-rsid="002059b9" style:font-weight-asian="normal" style:font-weight-complex="normal"/>
    </style:style>
    <style:style style:name="P8" style:family="paragraph" style:parent-style-name="Standard" style:list-style-name="L2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9" style:family="paragraph" style:parent-style-name="Standard" style:list-style-name="L2">
      <style:paragraph-properties fo:text-align="left" style:justify-single-word="false"/>
      <style:text-properties fo:font-weight="normal" officeooo:rsid="001cccb0" officeooo:paragraph-rsid="002059b9" style:font-weight-asian="normal" style:font-weight-complex="normal"/>
    </style:style>
    <style:style style:name="P10" style:family="paragraph" style:parent-style-name="Standard" style:list-style-name="L2">
      <style:paragraph-properties fo:text-align="left" style:justify-single-word="false"/>
      <style:text-properties fo:font-weight="normal" officeooo:rsid="001cccb0" officeooo:paragraph-rsid="0021a7c7" style:font-weight-asian="normal" style:font-weight-complex="normal"/>
    </style:style>
    <style:style style:name="P11" style:family="paragraph" style:parent-style-name="Standard" style:list-style-name="L2">
      <style:paragraph-properties fo:text-align="left" style:justify-single-word="false"/>
      <style:text-properties fo:font-weight="normal" officeooo:rsid="00241c34" officeooo:paragraph-rsid="00241c34" style:font-weight-asian="normal" style:font-weight-complex="normal"/>
    </style:style>
    <style:style style:name="P12" style:family="paragraph" style:parent-style-name="Standard" style:list-style-name="L3">
      <style:paragraph-properties fo:text-align="left" style:justify-single-word="false"/>
      <style:text-properties fo:font-weight="normal" officeooo:rsid="0025e519" officeooo:paragraph-rsid="0025e519" style:font-weight-asian="normal" style:font-weight-complex="normal"/>
    </style:style>
    <style:style style:name="P13" style:family="paragraph" style:parent-style-name="Standard" style:list-style-name="L3">
      <style:paragraph-properties fo:text-align="left" style:justify-single-word="false"/>
      <style:text-properties fo:font-weight="normal" officeooo:rsid="00224415" officeooo:paragraph-rsid="00224415" style:font-weight-asian="normal" style:font-weight-complex="normal"/>
    </style:style>
    <style:style style:name="P14" style:family="paragraph" style:parent-style-name="Standard" style:list-style-name="L3">
      <style:paragraph-properties fo:text-align="left" style:justify-single-word="false"/>
      <style:text-properties fo:font-style="normal" fo:font-weight="normal" officeooo:rsid="0025e519" officeooo:paragraph-rsid="0025e519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paragraph-properties fo:text-align="left" style:justify-single-word="false"/>
      <style:text-properties fo:font-style="normal" fo:font-weight="normal" officeooo:rsid="0027bb6d" officeooo:paragraph-rsid="0027bb6d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17" style:family="paragraph" style:parent-style-name="Standard" style:list-style-name="L4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18" style:family="paragraph" style:parent-style-name="Standard" style:list-style-name="L4">
      <style:paragraph-properties fo:text-align="left" style:justify-single-word="false"/>
      <style:text-properties fo:font-weight="normal" officeooo:rsid="001cccb0" officeooo:paragraph-rsid="001ea9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officeooo:rsid="001cccb0"/>
    </style:style>
    <style:style style:name="T6" style:family="text">
      <style:text-properties style:text-position="super 58%" officeooo:rsid="001cccb0"/>
    </style:style>
    <style:style style:name="T7" style:family="text">
      <style:text-properties officeooo:rsid="002059b9"/>
    </style:style>
    <style:style style:name="T8" style:family="text">
      <style:text-properties officeooo:rsid="0021a7c7"/>
    </style:style>
    <style:style style:name="T9" style:family="text">
      <style:text-properties fo:font-style="italic" officeooo:rsid="0021a7c7" style:font-style-asian="italic" style:font-style-complex="italic"/>
    </style:style>
    <style:style style:name="T10" style:family="text">
      <style:text-properties fo:font-style="italic" officeooo:rsid="0024e4a9" style:font-style-asian="italic" style:font-style-complex="italic"/>
    </style:style>
    <style:style style:name="T11" style:family="text">
      <style:text-properties fo:font-style="normal" officeooo:rsid="0024e4a9" style:font-style-asian="normal" style:font-style-complex="normal"/>
    </style:style>
    <style:style style:name="T12" style:family="text">
      <style:text-properties officeooo:rsid="0025ffc9"/>
    </style:style>
    <style:style style:name="T13" style:family="text">
      <style:text-properties fo:font-style="italic" officeooo:rsid="0025ffc9" style:font-style-asian="italic" style:font-style-complex="italic"/>
    </style:style>
    <style:style style:name="T14" style:family="text">
      <style:text-properties fo:font-style="normal" officeooo:rsid="0025ffc9" style:font-style-asian="normal" style:font-style-complex="normal"/>
    </style:style>
    <style:style style:name="T15" style:family="text">
      <style:text-properties officeooo:rsid="00267e12"/>
    </style:style>
    <style:style style:name="T16" style:family="text">
      <style:text-properties fo:font-style="italic" officeooo:rsid="00267e12" style:font-style-asian="italic" style:font-style-complex="italic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– Plan de vérification</text:p>
      <text:p text:style-name="P2"/>
      <text:p text:style-name="P3">Inspection :<text:span text:style-name="T1"/></text:p>
      <text:list text:style-name="L1">
        <text:list-item>
          <text:p text:style-name="P4">Dans le fichier <text:span text:style-name="T2">counter.vhd </text:span><text:span text:style-name="T3">vérifier qu’il n’y a pas d’erreur de syntaxe.</text:span></text:p>
        </text:list-item>
        <text:list-item>
          <text:p text:style-name="P5">Vérifier que la constante <text:span text:style-name="T2">threshod </text:span>est à 2x10<text:span text:style-name="T4">8</text:span></text:p>
        </text:list-item>
        <text:list-item>
          <text:p text:style-name="P5">Vérifier que le resetn remet à 0 <text:span text:style-name="T2">counter</text:span> et le signal <text:span text:style-name="T2">led</text:span></text:p>
        </text:list-item>
        <text:list-item>
          <text:p text:style-name="P5">Vérifier que le signal <text:span text:style-name="T2">end_counter</text:span> remet à 0 <text:span text:style-name="T2">counter</text:span> et fait changer <text:span text:style-name="T2">led</text:span> d’état</text:p>
        </text:list-item>
        <text:list-item>
          <text:p text:style-name="P5">Vérifier que le signal <text:span text:style-name="T2">restart</text:span> remet à 0 <text:span text:style-name="T2">counter</text:span> et <text:span text:style-name="T2">led</text:span></text:p>
        </text:list-item>
        <text:list-item>
          <text:p text:style-name="P4"><text:span text:style-name="T3">Vérifier que les signaux </text:span><text:span text:style-name="T2">end_counter </text:span><text:span text:style-name="T3">et </text:span><text:span text:style-name="T2">led </text:span><text:span text:style-name="T3"><text:s/>sont respectivement connectés à </text:span><text:span text:style-name="T2">end_counter_out </text:span><text:span text:style-name="T3">et </text:span><text:span text:style-name="T2">led0_b</text:span></text:p>
        </text:list-item>
        <text:list-item>
          <text:p text:style-name="P6">Dans le fichier <text:span text:style-name="T2">tb_counter.vhd</text:span> vérifier qu’il n’y a pas d’erreur de syntaxe</text:p>
        </text:list-item>
        <text:list-item>
          <text:p text:style-name="P6">Vérifier que les signaux d’interface avec <text:span text:style-name="T2">counter_unit</text:span> sont correctement connectés</text:p>
        </text:list-item>
        <text:list-item>
          <text:p text:style-name="P6">Vérifier que l’horloge a une période de 10ns</text:p>
        </text:list-item>
      </text:list>
      <text:p text:style-name="P3"/>
      <text:p text:style-name="P3">Analyse :</text:p>
      <text:list text:style-name="L2">
        <text:list-item>
          <text:p text:style-name="P7">Lancer la simulation. Aucun message d’erreur ne doit s’afficher</text:p>
        </text:list-item>
        <text:list-item>
          <text:p text:style-name="P7">Vérifier que le signal <text:span text:style-name="T2">counter</text:span><text:span text:style-name="T3"> compte jusqu’à </text:span><text:span text:style-name="T5">2x10</text:span><text:span text:style-name="T6">8</text:span></text:p>
        </text:list-item>
        <text:list-item>
          <text:p text:style-name="P8"><text:span text:style-name="T7">Vérifier que l</text:span>e temps de comptage est de 2s</text:p>
        </text:list-item>
        <text:list-item>
          <text:p text:style-name="P7">Une fois atteint ce délais, <text:span text:style-name="T2">end_counter </text:span><text:span text:style-name="T3">est à 1 pendant un cycle d’horloge et </text:span><text:span text:style-name="T2">counter </text:span><text:span text:style-name="T3">est remis à 0</text:span></text:p>
        </text:list-item>
        <text:list-item>
          <text:p text:style-name="P9"><text:span text:style-name="T7">Vérifier que l</text:span>e signal de la led est levé</text:p>
        </text:list-item>
        <text:list-item>
          <text:p text:style-name="P7">Se placer 2s plus tard dans le chronogramme</text:p>
        </text:list-item>
        <text:list-item>
          <text:p text:style-name="P10"><text:span text:style-name="T7">Vérifier que l</text:span>e signal de la led est <text:span text:style-name="T8">baissé</text:span></text:p>
        </text:list-item>
        <text:list-item>
          <text:p text:style-name="P8"><text:span text:style-name="T8">Vérifier que l</text:span>e signal de reset remet à 0<text:span text:style-name="T2"> </text:span><text:span text:style-name="T9">counter</text:span><text:span text:style-name="T2"> </text:span>et le signal de l<text:span text:style-name="T8">ed</text:span></text:p>
        </text:list-item>
        <text:list-item>
          <text:p text:style-name="P11">Vérifier que lorsque <text:span text:style-name="T2">restart </text:span><text:span text:style-name="T3">est à 1, </text:span><text:span text:style-name="T2">counter </text:span><text:span text:style-name="T3">et </text:span><text:span text:style-name="T2">led </text:span><text:span text:style-name="T3">sont remis à 0</text:span></text:p>
        </text:list-item>
      </text:list>
      <text:p text:style-name="P3"/>
      <text:p text:style-name="P3">Test :</text:p>
      <text:list text:style-name="L3">
        <text:list-item>
          <text:p text:style-name="P12">Lancer la synthèse</text:p>
        </text:list-item>
        <text:list-item>
          <text:p text:style-name="P13">Placer une ILA sur les signaux <text:span text:style-name="T10">resetn, restart, end_counter </text:span><text:span text:style-name="T11">et </text:span><text:span text:style-name="T10">led0_b</text:span></text:p>
        </text:list-item>
        <text:list-item>
          <text:p text:style-name="P14">Lancer l’implémentation et la génération du bitstream</text:p>
        </text:list-item>
        <text:list-item>
          <text:p text:style-name="P15">Brancher la carte et vérifier sa bonne connexion</text:p>
        </text:list-item>
        <text:list-item>
          <text:p text:style-name="P15">Lancer la programmation de la carte</text:p>
        </text:list-item>
        <text:list-item>
          <text:p text:style-name="P16"><text:span text:style-name="T12">Vérifier sur la carte que l</text:span>a led clignote toute les 2s</text:p>
        </text:list-item>
        <text:list-item>
          <text:p text:style-name="P16"><text:span text:style-name="T12">Vérifier que l</text:span>e signal sondé de la led alterne toute les 2s</text:p>
        </text:list-item>
        <text:list-item>
          <text:p text:style-name="P16"><text:span text:style-name="T12">Appuyer sur l</text:span>e bouton<text:span text:style-name="T2"> </text:span><text:span text:style-name="T13">restart</text:span><text:span text:style-name="T14"> et vérifier que cela</text:span><text:span text:style-name="T3"> </text:span>remet à 0 la led</text:p>
        </text:list-item>
        <text:list-item>
          <text:p text:style-name="P16"><text:span text:style-name="T12">Vérifier que l</text:span>e signal sondé<text:span text:style-name="T2"> </text:span><text:span text:style-name="T13">restart</text:span><text:span text:style-name="T2"> </text:span>est levé à la pression du bouton <text:span text:style-name="T13">restart</text:span></text:p>
        </text:list-item>
      </text:list>
      <text:p text:style-name="P3"/>
      <text:p text:style-name="P3">Démonstration :</text:p>
      <text:list text:style-name="L4">
        <text:list-item>
          <text:p text:style-name="P17"><text:span text:style-name="T15">Vérifier que l</text:span>a led clignote toute<text:span text:style-name="T15">s</text:span> les 2s</text:p>
        </text:list-item>
        <text:list-item>
          <text:p text:style-name="P18"><text:span text:style-name="T15">Vérifier que l</text:span>e bouton <text:span text:style-name="T16">restart</text:span> remet à 0 la le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7T11:50:15.390628573</meta:creation-date>
    <dc:date>2026-07-07T14:29:29.532108360</dc:date>
    <meta:editing-duration>PT2H18M26S</meta:editing-duration>
    <meta:editing-cycles>12</meta:editing-cycles>
    <meta:generator>LibreOffice/26.2.4.2$Linux_X86_64 LibreOffice_project/3346a99e6b841765b75a9b29714a5b95c6761ce3</meta:generator>
    <meta:document-statistic meta:table-count="0" meta:image-count="0" meta:object-count="0" meta:page-count="1" meta:paragraph-count="34" meta:word-count="346" meta:character-count="1797" meta:non-whitespace-character-count="1512"/>
  </office:meta>
</office:document-meta>
</file>