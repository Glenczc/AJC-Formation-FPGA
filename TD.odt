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ccb0" officeooo:paragraph-rsid="001cccb0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fo:font-weight="bold" officeooo:rsid="001cccb0" officeooo:paragraph-rsid="001cccb0" style:font-weight-asian="bold" style:font-weight-complex="bold"/>
    </style:style>
    <style:style style:name="P4" style:family="paragraph" style:parent-style-name="Standard" style:list-style-name="L1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5" style:family="paragraph" style:parent-style-name="Standard" style:list-style-name="L2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6" style:family="paragraph" style:parent-style-name="Standard" style:list-style-name="L3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7" style:family="paragraph" style:parent-style-name="Standard" style:list-style-name="L4">
      <style:paragraph-properties fo:text-align="left" style:justify-single-word="false"/>
      <style:text-properties fo:font-weight="normal" officeooo:rsid="001cccb0" officeooo:paragraph-rsid="001cccb0" style:font-weight-asian="normal" style:font-weight-complex="normal"/>
    </style:style>
    <style:style style:name="P8" style:family="paragraph" style:parent-style-name="Standard" style:list-style-name="L4">
      <style:paragraph-properties fo:text-align="left" style:justify-single-word="false"/>
      <style:text-properties fo:font-weight="normal" officeooo:rsid="001cccb0" officeooo:paragraph-rsid="001ea9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– Plan de vérification</text:p>
      <text:p text:style-name="P2"/>
      <text:p text:style-name="P3">Inspection :<text:span text:style-name="T1"/></text:p>
      <text:list text:style-name="L1">
        <text:list-item>
          <text:p text:style-name="P4">Le compteur compte effectivement</text:p>
        </text:list-item>
        <text:list-item>
          <text:p text:style-name="P4">Il s’arrête après un temps</text:p>
        </text:list-item>
        <text:list-item>
          <text:p text:style-name="P4">Il déclenche la led</text:p>
        </text:list-item>
        <text:list-item>
          <text:p text:style-name="P4">Il redémarre</text:p>
        </text:list-item>
      </text:list>
      <text:p text:style-name="P3"/>
      <text:p text:style-name="P3">Analyse :</text:p>
      <text:list text:style-name="L2">
        <text:list-item>
          <text:p text:style-name="P5">Le compteur compte jusqu’à 2x10<text:span text:style-name="T2">8</text:span></text:p>
        </text:list-item>
        <text:list-item>
          <text:p text:style-name="P5">Le temps de comptage est de 2s</text:p>
        </text:list-item>
        <text:list-item>
          <text:p text:style-name="P5">Remise à 0 après ces 2s</text:p>
        </text:list-item>
        <text:list-item>
          <text:p text:style-name="P5">Le signal de la led est levé après 2s puis baissé après 2s</text:p>
        </text:list-item>
        <text:list-item>
          <text:p text:style-name="P5">Le signal de reset remet à 0 le compteur et le signal de led</text:p>
        </text:list-item>
      </text:list>
      <text:p text:style-name="P3"/>
      <text:p text:style-name="P3">Test :</text:p>
      <text:list text:style-name="L3">
        <text:list-item>
          <text:p text:style-name="P6">La led clignote toute les 2s</text:p>
        </text:list-item>
        <text:list-item>
          <text:p text:style-name="P6">Le signal sondé de la led alterne toute les 2s</text:p>
        </text:list-item>
        <text:list-item>
          <text:p text:style-name="P6">Le bouton reset remet à 0 la led</text:p>
        </text:list-item>
        <text:list-item>
          <text:p text:style-name="P6">Le signal sondé de reset est levé à la pression du bouton reset</text:p>
        </text:list-item>
      </text:list>
      <text:p text:style-name="P3"/>
      <text:p text:style-name="P3">Démonstration :</text:p>
      <text:list text:style-name="L4">
        <text:list-item>
          <text:p text:style-name="P7">La led clignote toute les 2s</text:p>
        </text:list-item>
        <text:list-item>
          <text:p text:style-name="P8">Le bouton reset remet à 0 la le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7T11:50:15.390628573</meta:creation-date>
    <dc:date>2026-07-07T12:01:19.483655850</dc:date>
    <meta:editing-duration>PT50S</meta:editing-duration>
    <meta:editing-cycles>1</meta:editing-cycles>
    <meta:generator>LibreOffice/26.2.4.2$Linux_X86_64 LibreOffice_project/3346a99e6b841765b75a9b29714a5b95c6761ce3</meta:generator>
    <meta:document-statistic meta:table-count="0" meta:image-count="0" meta:object-count="0" meta:page-count="1" meta:paragraph-count="20" meta:word-count="138" meta:character-count="603" meta:non-whitespace-character-count="499"/>
  </office:meta>
</office:document-meta>
</file>