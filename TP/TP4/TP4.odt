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220000020125C29678.png" manifest:media-type="image/png"/>
  <manifest:file-entry manifest:full-path="Pictures/10000001000005FB0000014C1AE4D171.png" manifest:media-type="image/png"/>
  <manifest:file-entry manifest:full-path="Pictures/1000000100000134000001047638CA1A.png" manifest:media-type="image/png"/>
  <manifest:file-entry manifest:full-path="Pictures/10000001000006030000014AB3F6CD5F.png" manifest:media-type="image/png"/>
  <manifest:file-entry manifest:full-path="Pictures/10000001000005FF000001512F2CEBDF.png" manifest:media-type="image/png"/>
  <manifest:file-entry manifest:full-path="Pictures/10000001000004D2000002873E980630.png" manifest:media-type="image/png"/>
  <manifest:file-entry manifest:full-path="Pictures/1000000100000715000001C570AB7380.png" manifest:media-type="image/png"/>
  <manifest:file-entry manifest:full-path="Pictures/1000000100000533000002F8F535D2E1.png" manifest:media-type="image/png"/>
  <manifest:file-entry manifest:full-path="Pictures/10000001000006020000014CC9E26622.png" manifest:media-type="image/png"/>
  <manifest:file-entry manifest:full-path="Pictures/100000010000071B000001C78D96C3D2.png" manifest:media-type="image/png"/>
  <manifest:file-entry manifest:full-path="Pictures/1000000100000605000001BACE77DABC.png" manifest:media-type="image/png"/>
  <manifest:file-entry manifest:full-path="Pictures/1000000100000717000001CC3483B520.png" manifest:media-type="image/png"/>
  <manifest:file-entry manifest:full-path="Pictures/100000010000037C00000114B37906B8.png" manifest:media-type="image/png"/>
  <manifest:file-entry manifest:full-path="Pictures/10000001000001EC00000142E772866E.png" manifest:media-type="image/png"/>
  <manifest:file-entry manifest:full-path="Pictures/1000000100000602000001BC4E3E36F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6fce6" officeooo:paragraph-rsid="0016fce6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officeooo:rsid="0048243f" officeooo:paragraph-rsid="0048243f" style:font-weight-asian="normal" style:font-weight-complex="normal"/>
    </style:style>
    <style:style style:name="P3" style:family="paragraph" style:parent-style-name="Standard">
      <style:paragraph-properties fo:text-align="left" style:justify-single-word="false"/>
      <style:text-properties fo:font-weight="normal" officeooo:rsid="0016fce6" officeooo:paragraph-rsid="0016fce6" style:font-weight-asian="normal" style:font-weight-complex="normal"/>
    </style:style>
    <style:style style:name="P4" style:family="paragraph" style:parent-style-name="Standard">
      <style:paragraph-properties fo:text-align="left" style:justify-single-word="false"/>
      <style:text-properties fo:font-weight="normal" officeooo:rsid="00188f00" officeooo:paragraph-rsid="00188f00" style:font-weight-asian="normal" style:font-weight-complex="normal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 style:writing-mode="lr-tb"/>
    </style:style>
    <style:style style:name="P7" style:family="paragraph">
      <style:paragraph-properties fo:text-align="center"/>
      <style:text-properties fo:font-style="italic" style:font-style-asian="italic" style:font-style-complex="italic"/>
    </style:style>
    <style:style style:name="P8" style:family="paragraph">
      <loext:graphic-properties draw:fill-color="#ffffff"/>
      <style:paragraph-properties fo:text-align="center" style:writing-mode="lr-tb"/>
      <style:text-properties fo:font-style="italic" style:font-style-asian="italic" style:font-style-complex="italic"/>
    </style:style>
    <style:style style:name="P9" style:family="paragraph">
      <style:paragraph-properties fo:text-align="center"/>
      <style:text-properties fo:font-size="12pt"/>
    </style:style>
    <style:style style:name="P10" style:family="paragraph">
      <loext:graphic-properties draw:fill="none" draw:fill-color="#ffffff"/>
      <style:text-properties fo:font-style="italic" style:font-style-asian="italic" style:font-style-complex="italic"/>
    </style:style>
    <style:style style:name="P11" style:family="paragraph">
      <loext:graphic-properties draw:fill="none" draw:fill-color="#ffffff"/>
      <style:text-properties fo:font-size="12pt" fo:font-style="italic" style:font-style-asian="italic" style:font-style-complex="italic"/>
    </style:style>
    <style:style style:name="P12" style:family="paragraph" style:parent-style-name="Standard">
      <style:paragraph-properties fo:text-align="left" style:justify-single-word="false"/>
      <style:text-properties fo:font-weight="normal" officeooo:rsid="0018b9fc" officeooo:paragraph-rsid="0018b9fc" style:font-weight-asian="normal" style:font-weight-complex="normal"/>
    </style:style>
    <style:style style:name="P13" style:family="paragraph" style:parent-style-name="Standard">
      <style:paragraph-properties fo:text-align="left" style:justify-single-word="false"/>
      <style:text-properties fo:font-weight="normal" officeooo:rsid="001c6ab4" officeooo:paragraph-rsid="001c6ab4" style:font-weight-asian="normal" style:font-weight-complex="normal"/>
    </style:style>
    <style:style style:name="P14" style:family="paragraph" style:parent-style-name="Standard">
      <style:paragraph-properties fo:text-align="left" style:justify-single-word="false"/>
      <style:text-properties fo:font-weight="normal" officeooo:rsid="001a462e" officeooo:paragraph-rsid="001a462e" style:font-weight-asian="normal" style:font-weight-complex="normal"/>
    </style:style>
    <style:style style:name="P15" style:family="paragraph" style:parent-style-name="Standard">
      <style:paragraph-properties fo:text-align="left" style:justify-single-word="false"/>
      <style:text-properties fo:font-weight="normal" officeooo:rsid="0018b9fc" officeooo:paragraph-rsid="001a462e" style:font-weight-asian="normal" style:font-weight-complex="normal"/>
    </style:style>
    <style:style style:name="P16" style:family="paragraph" style:parent-style-name="Standard">
      <style:paragraph-properties fo:text-align="left" style:justify-single-word="false"/>
      <style:text-properties fo:font-style="normal" fo:font-weight="normal" officeooo:rsid="001c6ab4" officeooo:paragraph-rsid="001c6ab4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left" style:justify-single-word="false"/>
      <style:text-properties fo:font-style="normal" fo:font-weight="normal" officeooo:rsid="00334ef4" officeooo:paragraph-rsid="00334ef4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left" style:justify-single-word="false"/>
      <style:text-properties fo:font-weight="normal" officeooo:rsid="001d7e74" officeooo:paragraph-rsid="001d7e74" style:font-weight-asian="normal" style:font-weight-complex="normal"/>
    </style:style>
    <style:style style:name="P19" style:family="paragraph" style:parent-style-name="Standard">
      <style:paragraph-properties fo:text-align="left" style:justify-single-word="false"/>
      <style:text-properties fo:font-weight="normal" officeooo:rsid="00353c3c" officeooo:paragraph-rsid="0035f176" style:font-weight-asian="normal" style:font-weight-complex="normal"/>
    </style:style>
    <style:style style:name="P20" style:family="paragraph" style:parent-style-name="Standard">
      <style:paragraph-properties fo:text-align="left" style:justify-single-word="false"/>
      <style:text-properties fo:font-weight="normal" officeooo:rsid="001e8fbb" officeooo:paragraph-rsid="001e8fbb" style:font-weight-asian="normal" style:font-weight-complex="normal"/>
    </style:style>
    <style:style style:name="P21" style:family="paragraph" style:parent-style-name="Standard">
      <style:paragraph-properties fo:text-align="left" style:justify-single-word="false"/>
      <style:text-properties fo:font-style="normal" fo:font-weight="normal" officeooo:rsid="00205b0e" officeooo:paragraph-rsid="00205b0e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left" style:justify-single-word="false"/>
      <style:text-properties fo:font-style="normal" fo:font-weight="normal" officeooo:rsid="00219aa0" officeooo:paragraph-rsid="00219aa0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left" style:justify-single-word="false"/>
      <style:text-properties fo:font-style="normal" fo:font-weight="normal" officeooo:rsid="00229cf2" officeooo:paragraph-rsid="00229cf2" style:font-style-asian="normal" style:font-weight-asian="normal" style:font-style-complex="normal" style:font-weight-complex="normal"/>
    </style:style>
    <style:style style:name="P24" style:family="paragraph">
      <loext:graphic-properties draw:fill="none" draw:fill-color="#ffffff"/>
      <style:paragraph-properties fo:text-align="center"/>
      <style:text-properties fo:font-size="12pt" fo:font-style="italic" style:font-style-asian="italic" style:font-style-complex="italic"/>
    </style:style>
    <style:style style:name="P25" style:family="paragraph" style:parent-style-name="Standard">
      <style:paragraph-properties fo:text-align="left" style:justify-single-word="false"/>
      <style:text-properties fo:font-weight="normal" officeooo:rsid="0024880e" officeooo:paragraph-rsid="0024880e" style:font-weight-asian="normal" style:font-weight-complex="normal"/>
    </style:style>
    <style:style style:name="P26" style:family="paragraph" style:parent-style-name="Standard">
      <style:paragraph-properties fo:text-align="left" style:justify-single-word="false"/>
      <style:text-properties fo:font-weight="normal" officeooo:rsid="0028f20c" officeooo:paragraph-rsid="00379a5f" style:font-weight-asian="normal" style:font-weight-complex="normal"/>
    </style:style>
    <style:style style:name="P27" style:family="paragraph" style:parent-style-name="Standard">
      <style:paragraph-properties fo:text-align="left" style:justify-single-word="false" fo:break-before="page"/>
      <style:text-properties fo:font-weight="normal" officeooo:rsid="0028f20c" officeooo:paragraph-rsid="00379a5f" style:font-weight-asian="normal" style:font-weight-complex="normal"/>
    </style:style>
    <style:style style:name="P28" style:family="paragraph" style:parent-style-name="Standard">
      <style:paragraph-properties fo:text-align="left" style:justify-single-word="false"/>
      <style:text-properties fo:font-weight="normal" officeooo:rsid="0028f20c" officeooo:paragraph-rsid="0028f20c" style:font-weight-asian="normal" style:font-weight-complex="normal"/>
    </style:style>
    <style:style style:name="P29" style:family="paragraph" style:parent-style-name="Standard">
      <style:paragraph-properties fo:text-align="left" style:justify-single-word="false"/>
      <style:text-properties fo:font-weight="normal" officeooo:rsid="0034e3cc" officeooo:paragraph-rsid="0034e3cc" style:font-weight-asian="normal" style:font-weight-complex="normal"/>
    </style:style>
    <style:style style:name="P30" style:family="paragraph" style:parent-style-name="Standard">
      <style:paragraph-properties fo:text-align="left" style:justify-single-word="false"/>
      <style:text-properties fo:font-weight="normal" officeooo:rsid="0028f20c" officeooo:paragraph-rsid="0034e3cc" style:font-weight-asian="normal" style:font-weight-complex="normal"/>
    </style:style>
    <style:style style:name="P31" style:family="paragraph" style:parent-style-name="Standard">
      <style:paragraph-properties fo:text-align="left" style:justify-single-word="false"/>
      <style:text-properties fo:font-weight="normal" officeooo:rsid="00353c3c" officeooo:paragraph-rsid="00353c3c" style:font-weight-asian="normal" style:font-weight-complex="normal"/>
    </style:style>
    <style:style style:name="P32" style:family="paragraph" style:parent-style-name="Standard">
      <style:paragraph-properties fo:text-align="left" style:justify-single-word="false"/>
      <style:text-properties fo:font-weight="normal" officeooo:rsid="002e4737" officeooo:paragraph-rsid="002e4737" style:font-weight-asian="normal" style:font-weight-complex="normal"/>
    </style:style>
    <style:style style:name="P33" style:family="paragraph" style:parent-style-name="Standard">
      <style:paragraph-properties fo:text-align="left" style:justify-single-word="false"/>
      <style:text-properties fo:font-style="normal" fo:font-weight="normal" officeooo:rsid="002e4737" officeooo:paragraph-rsid="002e4737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left" style:justify-single-word="false"/>
      <style:text-properties fo:font-style="italic" fo:font-weight="normal" officeooo:rsid="002e4737" officeooo:paragraph-rsid="002e4737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left" style:justify-single-word="false"/>
      <style:text-properties fo:font-style="normal" fo:font-weight="normal" officeooo:rsid="002f0c8b" officeooo:paragraph-rsid="002f0c8b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left" style:justify-single-word="false"/>
      <style:text-properties fo:font-style="italic" style:text-underline-style="none" fo:font-weight="normal" officeooo:rsid="002f0c8b" officeooo:paragraph-rsid="002f0c8b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left" style:justify-single-word="false"/>
      <style:text-properties fo:font-style="normal" style:text-underline-style="none" fo:font-weight="normal" officeooo:rsid="002f0c8b" officeooo:paragraph-rsid="002f0c8b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left" style:justify-single-word="false"/>
      <style:text-properties fo:font-weight="normal" officeooo:rsid="002f0c8b" officeooo:paragraph-rsid="002f0c8b" style:font-weight-asian="normal" style:font-weight-complex="normal"/>
    </style:style>
    <style:style style:name="P39" style:family="paragraph" style:parent-style-name="Standard">
      <style:paragraph-properties fo:text-align="left" style:justify-single-word="false"/>
      <style:text-properties fo:font-style="normal" style:text-underline-style="none" fo:font-weight="normal" officeooo:rsid="002f6df1" officeooo:paragraph-rsid="002f6df1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left" style:justify-single-word="false"/>
      <style:text-properties fo:font-style="normal" style:text-underline-style="none" fo:font-weight="normal" officeooo:rsid="0030d934" officeooo:paragraph-rsid="0030d934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left" style:justify-single-word="false"/>
      <style:text-properties fo:font-style="normal" style:text-underline-style="none" fo:font-weight="normal" officeooo:rsid="0038b214" officeooo:paragraph-rsid="0038b214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left" style:justify-single-word="false"/>
      <style:text-properties fo:font-style="normal" style:text-underline-style="none" fo:font-weight="normal" officeooo:rsid="003c4015" officeooo:paragraph-rsid="003c4015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left" style:justify-single-word="false"/>
      <style:text-properties fo:font-style="italic" style:text-underline-style="none" fo:font-weight="normal" officeooo:rsid="003c4015" officeooo:paragraph-rsid="003c4015" style:font-style-asian="italic" style:font-weight-asian="normal" style:font-style-complex="italic" style:font-weight-complex="normal"/>
    </style:style>
    <style:style style:name="P44" style:family="paragraph" style:parent-style-name="Standard">
      <style:paragraph-properties fo:text-align="left" style:justify-single-word="false"/>
      <style:text-properties fo:font-weight="normal" officeooo:rsid="003a2f31" officeooo:paragraph-rsid="003a2f31" style:font-weight-asian="normal" style:font-weight-complex="normal"/>
    </style:style>
    <style:style style:name="P45" style:family="paragraph" style:parent-style-name="Standard">
      <style:paragraph-properties fo:text-align="left" style:justify-single-word="false"/>
      <style:text-properties fo:font-weight="normal" officeooo:rsid="003e4904" officeooo:paragraph-rsid="003e4904" style:font-weight-asian="normal" style:font-weight-complex="normal"/>
    </style:style>
    <style:style style:name="P46" style:family="paragraph" style:parent-style-name="Standard">
      <style:paragraph-properties fo:text-align="left" style:justify-single-word="false"/>
      <style:text-properties fo:font-style="italic" fo:font-weight="normal" officeooo:rsid="003e4904" officeooo:paragraph-rsid="003e4904" style:font-style-asian="italic" style:font-weight-asian="normal" style:font-style-complex="italic" style:font-weight-complex="normal"/>
    </style:style>
    <style:style style:name="P47" style:family="paragraph" style:parent-style-name="Standard">
      <style:paragraph-properties fo:text-align="left" style:justify-single-word="false"/>
      <style:text-properties fo:font-weight="normal" officeooo:rsid="0040d897" officeooo:paragraph-rsid="0040d897" style:font-weight-asian="normal" style:font-weight-complex="normal"/>
    </style:style>
    <style:style style:name="P48" style:family="paragraph" style:parent-style-name="Standard">
      <style:paragraph-properties fo:text-align="left" style:justify-single-word="false"/>
      <style:text-properties fo:font-weight="normal" officeooo:rsid="004365c9" officeooo:paragraph-rsid="004365c9" style:font-weight-asian="normal" style:font-weight-complex="normal"/>
    </style:style>
    <style:style style:name="P49" style:family="paragraph" style:parent-style-name="Standard">
      <style:paragraph-properties fo:text-align="left" style:justify-single-word="false"/>
      <style:text-properties fo:font-weight="normal" officeooo:rsid="004c3c0a" officeooo:paragraph-rsid="004c3c0a" style:font-weight-asian="normal" style:font-weight-complex="normal"/>
    </style:style>
    <style:style style:name="P50" style:family="paragraph" style:parent-style-name="Standard">
      <style:paragraph-properties fo:text-align="left" style:justify-single-word="false"/>
      <style:text-properties fo:font-style="normal" fo:font-weight="normal" officeooo:rsid="004c3c0a" officeooo:paragraph-rsid="004c3c0a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left" style:justify-single-word="false"/>
      <style:text-properties fo:font-weight="normal" officeooo:rsid="004f06cb" officeooo:paragraph-rsid="004f06cb" style:font-weight-asian="normal" style:font-weight-complex="normal"/>
    </style:style>
    <style:style style:name="P52" style:family="paragraph" style:parent-style-name="Standard">
      <style:paragraph-properties fo:text-align="left" style:justify-single-word="false"/>
      <style:text-properties fo:font-style="normal" fo:font-weight="normal" officeooo:rsid="004f06cb" officeooo:paragraph-rsid="004f06cb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left" style:justify-single-word="false"/>
      <style:text-properties fo:font-style="normal" fo:font-weight="normal" officeooo:rsid="004f06cb" officeooo:paragraph-rsid="0052ad05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left" style:justify-single-word="false"/>
      <style:text-properties fo:font-style="normal" fo:font-weight="normal" officeooo:rsid="004f9f3a" officeooo:paragraph-rsid="004f9f3a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left" style:justify-single-word="false"/>
      <style:text-properties fo:font-style="normal" fo:font-weight="normal" officeooo:rsid="0050eb82" officeooo:paragraph-rsid="0050eb82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left" style:justify-single-word="false"/>
      <style:text-properties fo:font-weight="normal" officeooo:rsid="0051ec39" officeooo:paragraph-rsid="0051ec39" style:font-weight-asian="normal" style:font-weight-complex="normal"/>
    </style:style>
    <style:style style:name="P57" style:family="paragraph" style:parent-style-name="Standard">
      <style:paragraph-properties fo:text-align="left" style:justify-single-word="false"/>
      <style:text-properties fo:font-weight="normal" officeooo:rsid="005387c4" officeooo:paragraph-rsid="005387c4" style:font-weight-asian="normal" style:font-weight-complex="normal"/>
    </style:style>
    <style:style style:name="P58" style:family="paragraph" style:parent-style-name="Standard">
      <style:paragraph-properties fo:text-align="left" style:justify-single-word="false"/>
      <style:text-properties fo:font-weight="normal" officeooo:rsid="0054a1d1" officeooo:paragraph-rsid="0054a1d1" style:font-weight-asian="normal" style:font-weight-complex="normal"/>
    </style:style>
    <style:style style:name="P59" style:family="paragraph" style:parent-style-name="Standard">
      <style:paragraph-properties fo:text-align="left" style:justify-single-word="false"/>
      <style:text-properties fo:font-weight="normal" officeooo:rsid="005523de" officeooo:paragraph-rsid="005523de" style:font-weight-asian="normal" style:font-weight-complex="normal"/>
    </style:style>
    <style:style style:name="P60" style:family="paragraph" style:parent-style-name="Standard">
      <style:paragraph-properties fo:text-align="left" style:justify-single-word="false"/>
      <style:text-properties fo:font-weight="normal" officeooo:rsid="0058bdb0" officeooo:paragraph-rsid="0058bdb0" style:font-weight-asian="normal" style:font-weight-complex="normal"/>
    </style:style>
    <style:style style:name="P61" style:family="paragraph" style:parent-style-name="Standard">
      <style:paragraph-properties fo:text-align="left" style:justify-single-word="false"/>
      <style:text-properties fo:font-weight="normal" officeooo:rsid="00566401" officeooo:paragraph-rsid="00566401" style:font-weight-asian="normal" style:font-weight-complex="normal"/>
    </style:style>
    <style:style style:name="P62" style:family="paragraph" style:parent-style-name="Standard">
      <style:paragraph-properties fo:text-align="left" style:justify-single-word="false"/>
      <style:text-properties fo:font-style="normal" fo:font-weight="normal" officeooo:rsid="005e647b" officeooo:paragraph-rsid="005e647b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text-align="left" style:justify-single-word="false"/>
      <style:text-properties fo:font-style="normal" fo:font-weight="normal" officeooo:rsid="005a1960" officeooo:paragraph-rsid="005a1960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text-align="left" style:justify-single-word="false"/>
      <style:text-properties fo:font-style="italic" fo:font-weight="normal" officeooo:rsid="005a1960" officeooo:paragraph-rsid="005a1960" style:font-style-asian="italic" style:font-weight-asian="normal" style:font-style-complex="italic" style:font-weight-complex="normal"/>
    </style:style>
    <style:style style:name="P65" style:family="paragraph" style:parent-style-name="Standard">
      <style:paragraph-properties fo:text-align="left" style:justify-single-word="false"/>
      <style:text-properties fo:font-style="normal" fo:font-weight="normal" officeooo:rsid="005da15f" officeooo:paragraph-rsid="005da15f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text-align="left" style:justify-single-word="false"/>
      <style:text-properties fo:font-style="normal" fo:font-weight="normal" officeooo:rsid="005fecf5" officeooo:paragraph-rsid="005fecf5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text-align="left" style:justify-single-word="false"/>
      <style:text-properties fo:font-style="italic" fo:font-weight="normal" officeooo:rsid="005fecf5" officeooo:paragraph-rsid="005fecf5" style:font-style-asian="italic" style:font-weight-asian="normal" style:font-style-complex="italic" style:font-weight-complex="normal"/>
    </style:style>
    <style:style style:name="P68" style:family="paragraph" style:parent-style-name="Standard">
      <style:paragraph-properties fo:text-align="left" style:justify-single-word="false"/>
      <style:text-properties fo:font-style="normal" fo:font-weight="normal" officeooo:rsid="00611299" officeooo:paragraph-rsid="00611299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text-align="left" style:justify-single-word="false"/>
      <style:text-properties fo:font-style="normal" fo:font-weight="normal" officeooo:rsid="0062b479" officeooo:paragraph-rsid="0062b479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text-align="left" style:justify-single-word="false" fo:break-before="page"/>
      <style:text-properties fo:font-style="normal" fo:font-weight="normal" officeooo:rsid="0062b479" officeooo:paragraph-rsid="0062b479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text-align="left" style:justify-single-word="false"/>
      <style:text-properties fo:font-style="normal" fo:font-weight="normal" officeooo:rsid="00640893" officeooo:paragraph-rsid="00640893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text-align="left" style:justify-single-word="false"/>
      <style:text-properties fo:font-style="normal" fo:font-weight="normal" officeooo:rsid="0064aff1" officeooo:paragraph-rsid="0064aff1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text-align="left" style:justify-single-word="false"/>
      <style:text-properties fo:font-style="normal" fo:font-weight="normal" officeooo:rsid="006804ad" officeooo:paragraph-rsid="006804ad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text-align="left" style:justify-single-word="false"/>
      <style:text-properties fo:font-style="normal" fo:font-weight="normal" officeooo:rsid="0066148c" officeooo:paragraph-rsid="0066148c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text-align="left" style:justify-single-word="false"/>
      <style:text-properties fo:font-style="normal" fo:font-weight="normal" officeooo:rsid="0062b479" officeooo:paragraph-rsid="00681ec7" style:font-style-asian="normal" style:font-weight-asian="normal" style:font-style-complex="normal" style:font-weight-complex="normal"/>
    </style:style>
    <style:style style:name="P76" style:family="paragraph" style:parent-style-name="Standard">
      <style:paragraph-properties fo:text-align="left" style:justify-single-word="false"/>
      <style:text-properties fo:font-style="normal" fo:font-weight="normal" officeooo:rsid="00681ec7" officeooo:paragraph-rsid="00681ec7" style:font-style-asian="normal" style:font-weight-asian="normal" style:font-style-complex="normal" style:font-weight-complex="normal"/>
    </style:style>
    <style:style style:name="P77" style:family="paragraph" style:parent-style-name="Standard">
      <style:paragraph-properties fo:text-align="left" style:justify-single-word="false"/>
      <style:text-properties fo:font-style="normal" fo:font-weight="normal" officeooo:rsid="00699fa1" officeooo:paragraph-rsid="00699fa1" style:font-style-asian="normal" style:font-weight-asian="normal" style:font-style-complex="normal" style:font-weight-complex="normal"/>
    </style:style>
    <style:style style:name="P78" style:family="paragraph" style:parent-style-name="Standard">
      <style:paragraph-properties fo:text-align="left" style:justify-single-word="false"/>
      <style:text-properties fo:font-style="normal" fo:font-weight="normal" officeooo:rsid="0069abe6" officeooo:paragraph-rsid="0069abe6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2pt" fo:font-style="italic" style:font-style-asian="italic" style:font-style-complex="italic"/>
    </style:style>
    <style:style style:name="T3" style:family="text">
      <style:text-properties fo:font-size="12pt"/>
    </style:style>
    <style:style style:name="T4" style:family="text">
      <style:text-properties officeooo:rsid="001a462e"/>
    </style:style>
    <style:style style:name="T5" style:family="text">
      <style:text-properties fo:font-style="italic" officeooo:rsid="001a462e" style:font-style-asian="italic" style:font-style-complex="italic"/>
    </style:style>
    <style:style style:name="T6" style:family="text">
      <style:text-properties fo:font-style="normal" officeooo:rsid="001a462e" style:font-style-asian="normal" style:font-style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officeooo:rsid="0038f0cc" style:font-style-asian="italic" style:font-style-complex="italic"/>
    </style:style>
    <style:style style:name="T9" style:family="text">
      <style:text-properties fo:font-style="italic" officeooo:rsid="0035f176" style:font-style-asian="italic" style:font-style-complex="italic"/>
    </style:style>
    <style:style style:name="T10" style:family="text">
      <style:text-properties officeooo:rsid="00219aa0"/>
    </style:style>
    <style:style style:name="T11" style:family="text">
      <style:text-properties fo:font-style="normal" officeooo:rsid="002f0c8b" style:font-style-asian="normal" style:font-style-complex="normal"/>
    </style:style>
    <style:style style:name="T12" style:family="text">
      <style:text-properties officeooo:rsid="002f0c8b"/>
    </style:style>
    <style:style style:name="T13" style:family="text">
      <style:text-properties officeooo:rsid="0069fb30"/>
    </style:style>
    <style:style style:name="T14" style:family="text">
      <style:text-properties fo:font-style="italic" style:text-underline-style="none" style:font-style-asian="italic" style:font-style-complex="italic"/>
    </style:style>
    <style:style style:name="T15" style:family="text">
      <style:text-properties style:text-underline-style="none"/>
    </style:style>
    <style:style style:name="T16" style:family="text">
      <style:text-properties fo:font-style="normal" style:text-underline-style="none" style:font-style-asian="normal" style:font-style-complex="normal"/>
    </style:style>
    <style:style style:name="T17" style:family="text">
      <style:text-properties officeooo:rsid="0030d934"/>
    </style:style>
    <style:style style:name="T18" style:family="text">
      <style:text-properties fo:font-style="italic" officeooo:rsid="0030d934" style:font-style-asian="italic" style:font-style-complex="italic"/>
    </style:style>
    <style:style style:name="T19" style:family="text">
      <style:text-properties officeooo:rsid="00316577"/>
    </style:style>
    <style:style style:name="T20" style:family="text">
      <style:text-properties fo:font-style="normal" officeooo:rsid="003e6fc5" style:font-style-asian="normal" style:font-style-complex="normal"/>
    </style:style>
    <style:style style:name="T21" style:family="text">
      <style:text-properties fo:font-style="normal" officeooo:rsid="0044d572" style:font-style-asian="normal" style:font-style-complex="normal"/>
    </style:style>
    <style:style style:name="T22" style:family="text">
      <style:text-properties fo:font-style="normal" officeooo:rsid="00468a3e" style:font-style-asian="normal" style:font-style-complex="normal"/>
    </style:style>
    <style:style style:name="T23" style:family="text">
      <style:text-properties fo:font-style="normal" officeooo:rsid="004409b1" style:font-style-asian="normal" style:font-style-complex="normal"/>
    </style:style>
    <style:style style:name="T24" style:family="text">
      <style:text-properties fo:font-style="italic" officeooo:rsid="004409b1" style:font-style-asian="italic" style:font-style-complex="italic"/>
    </style:style>
    <style:style style:name="T25" style:family="text">
      <style:text-properties style:text-position="sub 58%" officeooo:rsid="0052ad05"/>
    </style:style>
    <style:style style:name="T26" style:family="text">
      <style:text-properties style:text-position="0% 100%" officeooo:rsid="0052ad05"/>
    </style:style>
    <style:style style:name="T27" style:family="text">
      <style:text-properties officeooo:rsid="004f9f3a"/>
    </style:style>
    <style:style style:name="T28" style:family="text">
      <style:text-properties officeooo:rsid="005387c4"/>
    </style:style>
    <style:style style:name="T29" style:family="text">
      <style:text-properties style:text-position="sub 58%"/>
    </style:style>
    <style:style style:name="T30" style:family="text">
      <style:text-properties officeooo:rsid="0052ad05"/>
    </style:style>
    <style:style style:name="T31" style:family="text">
      <style:text-properties officeooo:rsid="0054a1d1"/>
    </style:style>
    <style:style style:name="T32" style:family="text">
      <style:text-properties officeooo:rsid="005fecf5"/>
    </style:style>
    <style:style style:name="T33" style:family="text">
      <style:text-properties officeooo:rsid="0064aff1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.379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81d41a" draw:marker-start-width="0.503cm" draw:marker-end-width="0.503cm" draw:fill-color="#ffffff" draw:textarea-horizontal-align="justify" draw:textarea-vertical-align="middle" draw:auto-grow-height="false" fo:min-height="2.87cm" fo:min-width="3.457cm" fo:padding-top="0.049cm" fo:padding-bottom="0.049cm" fo:padding-left="0.049cm" fo:padding-right="0.049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101cm" draw:marker-start-width="0.503cm" draw:marker-end-width="0.503cm" draw:fill-color="#ffffff" draw:textarea-horizontal-align="justify" draw:textarea-vertical-align="middle" draw:auto-grow-height="false" fo:min-height="3.002cm" fo:min-width="3.002cm" fo:padding-top="0.049cm" fo:padding-bottom="0.049cm" fo:padding-left="0.049cm" fo:padding-right="0.049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101cm" svg:stroke-color="#1c1c1c" draw:marker-start-width="0.503cm" draw:marker-end="Arrow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101cm" svg:stroke-color="#1c1c1c" draw:marker-start-width="0.504cm" draw:marker-end="Arrow" draw:marker-end-width="0.504cm" draw:textarea-horizontal-align="center" draw:textarea-vertical-align="middle" fo:padding-top="0.051cm" fo:padding-bottom="0.051cm" fo:padding-left="0.051cm" fo:padding-right="0.05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101cm" svg:stroke-color="#81d41a" draw:marker-start-width="0.503cm" draw:marker-end-width="0.503cm" draw:fill-color="#ffffff" draw:textarea-horizontal-align="justify" draw:textarea-vertical-align="middle" draw:auto-grow-height="false" fo:min-height="1.148cm" fo:min-width="1.148cm" fo:padding-top="0.049cm" fo:padding-bottom="0.049cm" fo:padding-left="0.049cm" fo:padding-right="0.049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.101cm" svg:stroke-color="#ea7500" draw:marker-start-width="0.503cm" draw:marker-end="Arrow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draw:fill="none" draw:fill-color="#ffffff" fo:min-height="0.48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.101cm" svg:stroke-color="#355269" draw:marker-start-width="0.503cm" draw:marker-end="Arrow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width="0.101cm" svg:stroke-color="#ea7500" draw:marker-start-width="0.503cm" draw:marker-end="Arrow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draw:fill="none" draw:fill-color="#ffffff" fo:min-height="0.489cm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vg:stroke-width="0.101cm" draw:marker-start-width="0.503cm" draw:marker-end-width="0.503cm" draw:fill-color="#ffffff" draw:textarea-horizontal-align="justify" draw:textarea-vertical-align="middle" draw:auto-grow-height="false" fo:min-height="1.445cm" fo:min-width="4.51cm" fo:padding-top="0.049cm" fo:padding-bottom="0.049cm" fo:padding-left="0.049cm" fo:padding-right="0.049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vg:stroke-width="0.101cm" svg:stroke-color="#55308d" draw:marker-start-width="0.503cm" draw:marker-end-width="0.503cm" draw:fill-color="#ffffff" draw:textarea-horizontal-align="justify" draw:textarea-vertical-align="middle" draw:auto-grow-height="false" fo:min-height="0.718cm" fo:min-width="1.827cm" fo:padding-top="0.049cm" fo:padding-bottom="0.049cm" fo:padding-left="0.049cm" fo:padding-right="0.049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svg:stroke-width="0.101cm" svg:stroke-color="#81d41a" draw:marker-start-width="0.503cm" draw:marker-end-width="0.503cm" draw:fill-color="#ffffff" draw:textarea-horizontal-align="justify" draw:textarea-vertical-align="middle" draw:auto-grow-height="false" fo:min-height="2.223cm" fo:min-width="2.085cm" fo:padding-top="0.049cm" fo:padding-bottom="0.049cm" fo:padding-left="0.049cm" fo:padding-right="0.049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draw:fill="none" draw:fill-color="#ffffff" fo:min-height="0.9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vg:stroke-width="0.101cm" svg:stroke-color="#81d41a" draw:marker-start-width="0.503cm" draw:marker-end-width="0.503cm" draw:fill-color="#ffffff" draw:textarea-horizontal-align="justify" draw:textarea-vertical-align="middle" draw:auto-grow-height="false" fo:min-height="1.148cm" fo:min-width="1.148cm" fo:padding-top="0.049cm" fo:padding-bottom="0.049cm" fo:padding-left="0.049cm" fo:padding-right="0.049cm" style:writing-mode="lr-tb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svg:stroke-width="0.101cm" svg:stroke-color="#355269" draw:marker-start-width="0.503cm" draw:marker-end="Arrow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101cm" svg:stroke-color="#1c1c1c" draw:marker-start-width="0.503cm" draw:marker-end="Arrow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width="0.101cm" svg:stroke-color="#55308d" draw:marker-start-width="0.503cm" draw:marker-end-width="0.503cm" draw:fill-color="#ffffff" draw:textarea-horizontal-align="justify" draw:textarea-vertical-align="middle" draw:auto-grow-height="false" fo:min-height="0.619cm" fo:min-width="1.729cm" fo:padding-top="0.049cm" fo:padding-bottom="0.049cm" fo:padding-left="0.049cm" fo:padding-right="0.049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svg:stroke-width="0.101cm" draw:marker-start-width="0.503cm" draw:marker-end-width="0.503cm" draw:fill-color="#ffffff" draw:textarea-horizontal-align="justify" draw:textarea-vertical-align="middle" draw:auto-grow-height="false" fo:min-height="1.445cm" fo:min-width="3.521cm" fo:padding-top="0.049cm" fo:padding-bottom="0.049cm" fo:padding-left="0.049cm" fo:padding-right="0.049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svg:stroke-width="0.101cm" svg:stroke-color="#1c1c1c" draw:marker-start-width="0.504cm" draw:marker-end="Arrow" draw:marker-end-width="0.504cm" draw:textarea-horizontal-align="center" draw:textarea-vertical-align="middle" fo:padding-top="0.051cm" fo:padding-bottom="0.051cm" fo:padding-left="0.051cm" fo:padding-right="0.05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svg:stroke-width="0.101cm" svg:stroke-color="#81d41a" draw:marker-start-width="0.503cm" draw:marker-end-width="0.503cm" draw:fill-color="#ffffff" draw:textarea-horizontal-align="justify" draw:textarea-vertical-align="middle" draw:auto-grow-height="false" fo:min-height="1.448cm" fo:min-width="1.483cm" fo:padding-top="0.049cm" fo:padding-bottom="0.049cm" fo:padding-left="0.049cm" fo:padding-right="0.049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svg:stroke-width="0.101cm" draw:marker-start-width="0.503cm" draw:marker-end-width="0.503cm" draw:fill-color="#ffffff" draw:textarea-horizontal-align="justify" draw:textarea-vertical-align="middle" draw:auto-grow-height="false" fo:min-height="5.62cm" fo:min-width="3.722cm" fo:padding-top="0.049cm" fo:padding-bottom="0.049cm" fo:padding-left="0.049cm" fo:padding-right="0.049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svg:stroke-width="0.101cm" svg:stroke-color="#55308d" draw:marker-start-width="0.503cm" draw:marker-end-width="0.503cm" draw:fill-color="#ffffff" draw:textarea-horizontal-align="justify" draw:textarea-vertical-align="middle" draw:auto-grow-height="false" fo:min-height="0.617cm" fo:min-width="1.729cm" fo:padding-top="0.049cm" fo:padding-bottom="0.049cm" fo:padding-left="0.049cm" fo:padding-right="0.049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4 – Pilotage de LED et mémoire</text:p>
      <text:p text:style-name="P2">Partie I</text:p>
      <text:p text:style-name="P3"/>
      <text:p text:style-name="P4">1)</text:p>
      <text:p text:style-name="P4"/>
      <text:p text:style-name="P4"><draw:custom-shape text:anchor-type="paragraph" draw:z-index="1" draw:name="Forme 4" draw:style-name="gr1" draw:text-style-name="P6" svg:width="5.028cm" svg:height="4.197cm" svg:x="9.481cm" svg:y="0.125cm"><text:p text:style-name="P5">FSM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><draw:custom-shape text:anchor-type="paragraph" draw:z-index="0" draw:name="Forme 1" draw:style-name="gr2" draw:text-style-name="P8" svg:width="3.102cm" svg:height="3.102cm" svg:x="2.745cm" svg:y="0.159cm"><text:p text:style-name="P7"><text:span text:style-name="T1">C</text:span><text:span text:style-name="T1">o</text:span><text:span text:style-name="T1">u</text:span><text:span text:style-name="T1">n</text:span><text:span text:style-name="T1">t</text:span><text:span text:style-name="T1">e</text:span><text:span text:style-name="T1">r</text:span><text:span text:style-name="T1">_</text:span><text:span text:style-name="T1">u</text:span><text:span text:style-name="T1">n</text:span><text:span text:style-name="T1">i</text:span><text:span text:style-name="T1">t</text:span></text:p><draw:enhanced-geometry svg:viewBox="0 0 21600 21600" draw:type="rectangle" draw:enhanced-path="M 0 0 L 21600 0 21600 21600 0 21600 0 0 Z N"/></draw:custom-shape></text:p>
      <text:p text:style-name="P4"/>
      <text:p text:style-name="P4"/>
      <text:p text:style-name="P4"><draw:line text:anchor-type="paragraph" draw:z-index="2" draw:name="Ligne 2" draw:style-name="gr3" draw:text-style-name="P7" svg:x1="5.846cm" svg:y1="0.236cm" svg:x2="9.384cm" svg:y2="0.236cm"><text:p text:style-name="P5"><text:span text:style-name="T1">end_counte</text:span><text:span text:style-name="T1">r</text:span></text:p><text:p text:style-name="P5"><text:span text:style-name="T1"/></text:p></draw:line><draw:line text:anchor-type="paragraph" draw:z-index="3" draw:name="Ligne horizontale 3" draw:style-name="gr4" draw:text-style-name="P7" svg:x1="14.508cm" svg:y1="0.34cm" svg:x2="17.641cm" svg:y2="0.375cm"><text:p text:style-name="P5"><text:span text:style-name="T1">led0_r</text:span></text:p><text:p text:style-name="P5"><text:span text:style-name="T1"/></text:p></draw:line><draw:line text:anchor-type="paragraph" draw:z-index="4" draw:name="Ligne 3" draw:style-name="gr3" draw:text-style-name="P5" svg:x1="1.76cm" svg:y1="0.212cm" svg:x2="2.744cm" svg:y2="0.231cm"><text:p text:style-name="P5">resetn <text:s text:c="6"/><text:s text:c="13"/></text:p></draw:line></text:p>
      <text:p text:style-name="P4"/>
      <text:p text:style-name="P4"/>
      <text:p text:style-name="P4"/>
      <text:p text:style-name="P4"/>
      <text:p text:style-name="P4"/>
      <text:p text:style-name="P4"/>
      <text:p text:style-name="P4"><draw:custom-shape text:anchor-type="paragraph" draw:z-index="6" draw:name="Forme 9" draw:style-name="gr5" draw:text-style-name="P6" svg:width="1.763cm" svg:height="1.763cm" svg:x="3.441cm" svg:y="0.259cm"><text:p text:style-name="P5">Allumé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Forme 7" draw:style-name="gr5" draw:text-style-name="P6" svg:width="1.763cm" svg:height="1.763cm" svg:x="11.691cm" svg:y="0.238cm"><text:p text:style-name="P5">Éteint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" draw:name="Ligne verticale 5" draw:style-name="gr6" draw:text-style-name="P9" svg:x1="4.357cm" svg:y1="0.238cm" svg:x2="12.513cm" svg:y2="0.238cm"><text:p text:style-name="P5"><text:span text:style-name="T2">end_c</text:span><text:span text:style-name="T2">ounter</text:span></text:p><text:p text:style-name="P5"><text:span text:style-name="T3"/></text:p></draw:line></text:p>
      <text:p text:style-name="P4"><draw:frame text:anchor-type="paragraph" draw:z-index="12" draw:name="Cadre de texte 3" draw:style-name="gr7" draw:text-style-name="P10" svg:width="2.271cm" svg:height="0.489cm" svg:x="0.873cm" svg:y="0.39cm"><draw:text-box><text:p><text:span text:style-name="T1">led0_r ← 1</text:span></text:p></draw:text-box></draw:frame><draw:frame text:anchor-type="paragraph" draw:z-index="11" draw:name="Cadre de texte 2" draw:style-name="gr7" draw:text-style-name="P10" svg:width="2.271cm" svg:height="0.489cm" svg:x="13.91cm" svg:y="0.388cm"><draw:text-box><text:p><text:span text:style-name="T1">led0_r ← 0</text:span></text:p></draw:text-box></draw:frame></text:p>
      <text:p text:style-name="P4"><draw:line text:anchor-type="paragraph" draw:z-index="7" draw:name="Ligne verticale 2" draw:style-name="gr8" draw:text-style-name="P5" svg:x1="5.219cm" svg:y1="0.164cm" svg:x2="11.691cm" svg:y2="0.164cm"><text:p text:style-name="P5">resetn</text:p><text:p text:style-name="P5"/></draw:line></text:p>
      <text:p text:style-name="P4"/>
      <text:p text:style-name="P4"><draw:line text:anchor-type="paragraph" draw:z-index="9" draw:name="Ligne horizontale 1" draw:style-name="gr9" draw:text-style-name="P7" svg:x1="12.601cm" svg:y1="0.074cm" svg:x2="4.399cm" svg:y2="0.074cm"><text:p/></draw:line><draw:frame text:anchor-type="paragraph" draw:z-index="10" draw:name="Cadre de texte 1" draw:style-name="gr10" draw:text-style-name="P11" svg:width="2.271cm" svg:height="0.489cm" svg:x="7.364cm" svg:y="0.074cm"><draw:text-box><text:p><text:span text:style-name="T2">end_counter</text:span></text:p></draw:text-box></draw:frame></text:p>
      <text:p text:style-name="P4"/>
      <text:p text:style-name="P4"/>
      <text:p text:style-name="P12">Cette machine d’état peut aussi être simplement remplacé par un registre <text:span text:style-name="T4">et une LUT. </text:span><text:span text:style-name="T5">led0_r </text:span><text:span text:style-name="T6">change d’état lorsque </text:span><text:span text:style-name="T5">end_counter </text:span><text:span text:style-name="T6">est à 1.</text:span></text:p>
      <text:p text:style-name="P12"/>
      <text:p text:style-name="P12"><draw:custom-shape text:anchor-type="paragraph" draw:z-index="13" draw:name="Forme 2" draw:style-name="gr2" draw:text-style-name="P8" svg:width="3.102cm" svg:height="3.102cm" svg:x="2.745cm" svg:y="0.159cm"><text:p text:style-name="P7"><text:span text:style-name="T1">Counter_unit</text:span></text:p><draw:enhanced-geometry svg:viewBox="0 0 21600 21600" draw:type="rectangle" draw:enhanced-path="M 0 0 L 21600 0 21600 21600 0 21600 0 0 Z N"/></draw:custom-shape><draw:line text:anchor-type="paragraph" draw:z-index="14" draw:name="Ligne 1" draw:style-name="gr3" draw:text-style-name="P7" svg:x1="5.846cm" svg:y1="1.903cm" svg:x2="9.384cm" svg:y2="1.903cm"><text:p text:style-name="P5"><text:span text:style-name="T1">end_counter</text:span></text:p><text:p text:style-name="P5"><text:span text:style-name="T1"/></text:p></draw:line></text:p>
      <text:p text:style-name="P12"/>
      <text:p text:style-name="P12"><draw:custom-shape text:anchor-type="paragraph" draw:z-index="17" draw:name="Forme 3" draw:style-name="gr11" draw:text-style-name="P8" svg:width="4.61cm" svg:height="1.544cm" svg:x="9.403cm" svg:y="0.123cm"><text:p text:style-name="P7"><text:span text:style-name="T7">LUT + registre 1bit</text:span></text:p><text:p text:style-name="P7"><text:span text:style-name="T1">led0_r ← not led0_r</text:span></text:p><draw:enhanced-geometry svg:viewBox="0 0 21600 21600" draw:type="rectangle" draw:enhanced-path="M 0 0 L 21600 0 21600 21600 0 21600 0 0 Z N"/></draw:custom-shape></text:p>
      <text:p text:style-name="P12"><draw:line text:anchor-type="paragraph" draw:z-index="16" draw:name="Ligne 4" draw:style-name="gr3" draw:text-style-name="P5" svg:x1="1.76cm" svg:y1="0.318cm" svg:x2="2.744cm" svg:y2="0.337cm"><text:p text:style-name="P5">resetn <text:s text:c="19"/></text:p></draw:line><draw:line text:anchor-type="paragraph" draw:z-index="15" draw:name="Ligne horizontale 2" draw:style-name="gr4" draw:text-style-name="P7" svg:x1="14.013cm" svg:y1="0.379cm" svg:x2="17.146cm" svg:y2="0.414cm"><text:p text:style-name="P5"><text:span text:style-name="T1">led0_r</text:span></text:p><text:p text:style-name="P5"><text:span text:style-name="T1"/></text:p></draw:line></text:p>
      <text:p text:style-name="P12"/>
      <text:p text:style-name="P12"/>
      <text:p text:style-name="P12"/>
      <text:p text:style-name="P12"/>
      <text:p text:style-name="P13"><draw:line text:anchor-type="paragraph" draw:z-index="26" draw:name="Ligne horizontale 7" draw:style-name="gr4" draw:text-style-name="P7" svg:x1="14.056cm" svg:y1="1.09cm" svg:x2="14.077cm" svg:y2="3.715cm"><text:p text:style-name="P5"><text:span text:style-name="T1">Bouton <text:s/></text:span></text:p><text:p text:style-name="P5"><text:span text:style-name="T1"/></text:p></draw:line>2)</text:p>
      <text:p text:style-name="P13"/>
      <text:p text:style-name="P14"/>
      <text:p text:style-name="P15"/>
      <text:p text:style-name="P15"><draw:custom-shape text:anchor-type="paragraph" draw:z-index="23" draw:name="Forme 8" draw:style-name="gr12" draw:text-style-name="P6" svg:width="3.26cm" svg:height="1.28cm" draw:transform="rotate (-1.5688764646177) translate (14.8025555555556cm 1.39170833333333cm)"><text:p text:style-name="P5">MUX</text:p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range-x-minimum="0" draw:handle-range-x-maximum="10800" draw:handle-position="$0 bottom" draw:handle-position-x="$0" draw:handle-position-y="bottom"/></draw:enhanced-geometry></draw:custom-shape><draw:custom-shape text:anchor-type="paragraph" draw:z-index="18" draw:name="Forme 5" draw:style-name="gr2" draw:text-style-name="P8" svg:width="3.102cm" svg:height="3.102cm" svg:x="2.411cm" svg:y="1.492cm"><text:p text:style-name="P7"><text:span text:style-name="T1">Counter_unit</text:span></text:p><draw:enhanced-geometry svg:viewBox="0 0 21600 21600" draw:type="rectangle" draw:enhanced-path="M 0 0 L 21600 0 21600 21600 0 21600 0 0 Z N"/></draw:custom-shape></text:p>
      <text:p text:style-name="P12"><draw:line text:anchor-type="paragraph" draw:z-index="24" draw:name="Ligne horizontale 5" draw:style-name="gr4" draw:text-style-name="P7" svg:x1="14.81cm" svg:y1="2.03cm" svg:x2="17.341cm" svg:y2="2.055cm"><text:p text:style-name="P5"><text:span text:style-name="T1">led0_r</text:span></text:p><text:p text:style-name="P5"><text:span text:style-name="T1"/></text:p></draw:line></text:p>
      <text:p text:style-name="P12"><draw:custom-shape text:anchor-type="paragraph" draw:z-index="22" draw:name="Forme 6" draw:style-name="gr13" draw:text-style-name="P6" svg:width="3.088cm" svg:height="3.282cm" svg:x="8.632cm" svg:y="0.203cm"><text:p text:style-name="P5">FSM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2"><draw:line text:anchor-type="paragraph" draw:z-index="19" draw:name="Ligne 5" draw:style-name="gr3" draw:text-style-name="P7" svg:x1="5.512cm" svg:y1="1.521cm" svg:x2="8.632cm" svg:y2="1.498cm"><text:p text:style-name="P5"><text:span text:style-name="T1">end_counter</text:span></text:p><text:p text:style-name="P5"><text:span text:style-name="T1"/></text:p></draw:line><draw:line text:anchor-type="paragraph" draw:z-index="21" draw:name="Ligne 6" draw:style-name="gr3" draw:text-style-name="P5" svg:x1="1.427cm" svg:y1="1.54cm" svg:x2="2.411cm" svg:y2="1.559cm"><text:p text:style-name="P5">resetn <text:s text:c="19"/></text:p></draw:line><draw:line text:anchor-type="paragraph" draw:z-index="20" draw:name="Ligne horizontale 4" draw:style-name="gr4" draw:text-style-name="P7" svg:x1="11.719cm" svg:y1="1.475cm" svg:x2="13.527cm" svg:y2="1.475cm"><text:p text:style-name="P5"><text:span text:style-name="T1">led</text:span></text:p><text:p text:style-name="P5"><text:span text:style-name="T1"/></text:p></draw:line></text:p>
      <text:p text:style-name="P12"><draw:line text:anchor-type="paragraph" draw:z-index="25" draw:name="Ligne horizontale 6" draw:style-name="gr4" draw:text-style-name="P7" svg:x1="14.81cm" svg:y1="2.03cm" svg:x2="17.341cm" svg:y2="2.055cm"><text:p text:style-name="P5"><text:span text:style-name="T1">led0_g</text:span></text:p><text:p text:style-name="P5"><text:span text:style-name="T1"/></text:p></draw:lin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La machine d’état ne pilote que le signal <text:span text:style-name="T1">led </text:span><text:span text:style-name="T7">qui allume ou éteint une led.</text:span></text:p>
      <text:p text:style-name="P16"><text:soft-page-break/>Le bouton sélectionne la led à faire clignoter. Cette partie peut être réalisée de manière combinatoire.</text:p>
      <text:p text:style-name="P16"/>
      <text:p text:style-name="P17">3)</text:p>
      <text:p text:style-name="P17"/>
      <text:p text:style-name="P17">Voici le process de la machine d’état.</text:p>
      <text:p text:style-name="P17"/>
      <text:p text:style-name="P17"><draw:frame draw:style-name="fr1" draw:name="Image5" text:anchor-type="char" svg:y="0.245cm" svg:width="8.862cm" svg:height="5.8cm" draw:z-index="57"><draw:image xlink:href="Pictures/10000001000001EC00000142E772866E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4)</text:p>
      <text:p text:style-name="P19">Le testbench de cette architecture est écrit dans le fichier <text:span text:style-name="T1">tb_led_</text:span><text:span text:style-name="T8">pilot</text:span><text:span text:style-name="T1">_q</text:span><text:span text:style-name="T9">4</text:span><text:span text:style-name="T1">.vhd.</text:span></text:p>
      <text:p text:style-name="P18"/>
      <text:p text:style-name="P18"><draw:frame draw:style-name="fr2" draw:name="Image1" text:anchor-type="char" svg:width="17cm" svg:height="3.644cm" draw:z-index="27"><draw:image xlink:href="Pictures/10000001000006030000014AB3F6CD5F.png" xlink:type="simple" xlink:show="embed" xlink:actuate="onLoad" draw:mime-type="image/png"/></draw:frame></text:p>
      <text:p text:style-name="P20">En rose les signaux interne<text:span text:style-name="T10">s</text:span> à <text:span text:style-name="T1">led_</text:span><text:span text:style-name="T8">pilot</text:span><text:span text:style-name="T1">.</text:span></text:p>
      <text:p text:style-name="P21">Après le reset, tous les signaux sont à 0, <text:span text:style-name="T1">current_state </text:span>est à « éteint » et <text:span text:style-name="T1">next_state </text:span>à « allumé ».</text:p>
      <text:p text:style-name="P21">Lorsque le compteur a terminé il envoie l’information par <text:span text:style-name="T1">end_counter.</text:span></text:p>
      <text:p text:style-name="P22">Alors, <text:span text:style-name="T1">current_state </text:span>passe à « allumé » et <text:span text:style-name="T1">next_state </text:span>à éteint.</text:p>
      <text:p text:style-name="P22">Le signal <text:span text:style-name="T1">led </text:span>passe alors à 1 et déclenche l’allumage d’une des 2 led.</text:p>
      <text:p text:style-name="P22">Le bouton n’étant pas appuyé, c’est la led rouge qui s’allume. Le peut le voir car le signal <text:span text:style-name="T1">led0_r </text:span>est à 1.</text:p>
      <text:p text:style-name="P22">Après 2 clignotement de la led rouge, on déclenche l’appui sur le bouton. On peut voir que c’est maintenant la led verte qui s’allume car le signal <text:span text:style-name="T1">led0_g </text:span>passe à 1.</text:p>
      <text:p text:style-name="P22">On relâche le bouton afin de tester son comportement lorsqu’il n’est actif que pendant un cycle d’horloge.</text:p>
      <text:p text:style-name="P22">La led verte s’allume uniquement pendant le bref appui du bouton. La led rouge reprend le relais dès que le bouton est relâché.</text:p>
      <text:p text:style-name="P22"/>
      <text:p text:style-name="P23">5)</text:p>
      <text:p text:style-name="P23">Pour ne faire clignoter la led verte qu’une seule fois, on peut changer la machine d’état.</text:p>
      <text:p text:style-name="P23">Au lieu de 2 états allumé et éteint, il y a 3 états : Rouge, Vert et Attente.</text:p>
      <text:p text:style-name="P23">Cette machine d’état ne gère plus le clignotement mais la led à faire clignoter.</text:p>
      <text:p text:style-name="P23"/>
      <text:p text:style-name="P23"/>
      <text:p text:style-name="P23"><text:soft-page-break/><text:line-break/></text:p>
      <text:p text:style-name="P18"/>
      <text:p text:style-name="P18"><draw:frame text:anchor-type="paragraph" draw:z-index="38" draw:name="Cadre de texte 10" draw:style-name="gr14" draw:text-style-name="P10" svg:width="2.867cm" svg:height="0.976cm" svg:x="6.994cm" svg:y="0.383cm"><draw:text-box><text:p><text:span text:style-name="T1">led0_g </text:span><text:span text:style-name="T7">clignote</text:span></text:p></draw:text-box></draw:frame></text:p>
      <text:p text:style-name="P18"/>
      <text:p text:style-name="P18"><draw:custom-shape text:anchor-type="paragraph" draw:z-index="28" draw:name="Forme 10" draw:style-name="gr15" draw:text-style-name="P6" svg:width="1.763cm" svg:height="1.763cm" svg:x="7.618cm" svg:y="0.042cm"><text:p text:style-name="P5">Ver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3"><draw:line text:anchor-type="paragraph" draw:z-index="31" draw:name="Ligne horizontale 8" draw:style-name="gr6" draw:text-style-name="P7" svg:x1="3.087cm" svg:y1="5.537cm" svg:x2="7.618cm" svg:y2="0.095cm"><text:p text:style-name="P5"><text:span text:style-name="T1">Bouton appuyé</text:span></text:p><text:p text:style-name="P5"><text:span text:style-name="T1"/></text:p></draw:line><draw:frame text:anchor-type="paragraph" draw:z-index="55" draw:name="Cadre de texte 6" draw:style-name="gr14" draw:text-style-name="P24" svg:width="8.199cm" svg:height="0.976cm" draw:transform="rotate (0.816639557008147) translate (3.78001388888889cm 6.24416666666667cm)"><draw:text-box><text:p text:style-name="P5"><text:span text:style-name="T2">1 clignotement de la led verte </text:span></text:p><text:p text:style-name="P5"><text:span text:style-name="T2">+ Bouton relâché</text:span></text:p></draw:text-box></draw:frame></text:p>
      <text:p text:style-name="P13"><draw:line text:anchor-type="paragraph" draw:z-index="34" draw:name="Ligne verticale 4" draw:style-name="gr16" draw:text-style-name="P5" svg:x1="7.766cm" svg:y1="0.422cm" svg:x2="3.554cm" svg:y2="5.05cm"><text:p/></draw:line></text:p>
      <text:p text:style-name="P13"><draw:line text:anchor-type="paragraph" draw:z-index="35" draw:name="Ligne verticale 6" draw:style-name="gr6" draw:text-style-name="P9" svg:x1="9.243cm" svg:y1="0.048cm" svg:x2="13.527cm" svg:y2="4.564cm"><text:p text:style-name="P5"><text:span text:style-name="T2">1 clignotement </text:span></text:p><text:p text:style-name="P5"><text:span text:style-name="T2">de la led verte</text:span></text:p><text:p text:style-name="P5"><text:span text:style-name="T2"/></text:p><text:p text:style-name="P5"><text:span text:style-name="T2"/></text:p></draw:line><draw:line text:anchor-type="paragraph" draw:z-index="54" draw:name="Ligne verticale 8" draw:style-name="gr9" draw:text-style-name="P9" svg:x1="8.296cm" svg:y1="0.344cm" svg:x2="3.941cm" svg:y2="4.902cm"><text:p/></draw:line></text:p>
      <text:p text:style-name="P13"><draw:frame text:anchor-type="paragraph" draw:z-index="36" draw:name="Cadre de texte 7" draw:style-name="gr7" draw:text-style-name="P24" svg:width="2.52cm" svg:height="0.489cm" draw:transform="rotate (0.91717052192302) translate (4.60375cm 2.28247222222222cm)"><draw:text-box><text:p text:style-name="P5"><text:span text:style-name="T2">resetn</text:span></text:p></draw:text-box></draw:frame></text:p>
      <text:p text:style-name="P13"/>
      <text:p text:style-name="P13"/>
      <text:p text:style-name="P13"/>
      <text:p text:style-name="P13"><draw:custom-shape text:anchor-type="paragraph" draw:z-index="29" draw:name="Forme 11" draw:style-name="gr5" draw:text-style-name="P6" svg:width="1.763cm" svg:height="1.763cm" svg:x="2.298cm" svg:y="2.129cm"><text:p text:style-name="P5">Roug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3"/>
      <text:p text:style-name="P13"/>
      <text:p text:style-name="P13"><draw:frame text:anchor-type="paragraph" draw:z-index="37" draw:name="Cadre de texte 8" draw:style-name="gr7" draw:text-style-name="P24" svg:width="2.52cm" svg:height="0.489cm" draw:transform="rotate (0.0167551608191456) translate (7.37834722222222cm 0.497416666666667cm)"><draw:text-box><text:p text:style-name="P5"><text:span text:style-name="T2">resetn</text:span></text:p></draw:text-box></draw:frame></text:p>
      <text:p text:style-name="P13"><draw:custom-shape text:anchor-type="paragraph" draw:z-index="33" draw:name="Forme 12" draw:style-name="gr5" draw:text-style-name="P6" svg:width="1.763cm" svg:height="1.763cm" svg:x="12.966cm" svg:y="0.182cm"><text:p text:style-name="P5">Attent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3"><draw:frame text:anchor-type="paragraph" draw:z-index="32" draw:name="Cadre de texte 5" draw:style-name="gr14" draw:text-style-name="P10" svg:width="2.867cm" svg:height="0.976cm" svg:x="-0.446cm" svg:y="0.482cm"><draw:text-box><text:p><text:span text:style-name="T1">led0_r </text:span><text:span text:style-name="T7">clignote</text:span></text:p></draw:text-box></draw:frame><draw:line text:anchor-type="paragraph" draw:z-index="30" draw:name="Ligne verticale 1" draw:style-name="gr16" draw:text-style-name="P5" svg:x1="12.966cm" svg:y1="0.174cm" svg:x2="4.06cm" svg:y2="0.155cm"><text:p/></draw:lin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line text:anchor-type="paragraph" draw:z-index="46" draw:name="Ligne horizontale 12" draw:style-name="gr4" draw:text-style-name="P7" svg:x1="10.791cm" svg:y1="0.218cm" svg:x2="10.812cm" svg:y2="2.843cm"><text:p text:style-name="P5"><text:span text:style-name="T1">Bouton <text:s text:c="3"/></text:span></text:p><text:p text:style-name="P5"><text:span text:style-name="T1"/></text:p></draw:line><draw:frame text:anchor-type="paragraph" draw:z-index="53" draw:name="Cadre de texte 4" draw:style-name="gr7" draw:text-style-name="P11" svg:width="3.275cm" svg:height="0.489cm" svg:x="7.25cm" svg:y="-4.905cm"><draw:text-box><text:p><text:span text:style-name="T2">Bouton relâché</text:span></text:p></draw:text-box></draw:frame><draw:line text:anchor-type="paragraph" draw:z-index="52" draw:name="Ligne verticale 7" draw:style-name="gr9" draw:text-style-name="P9" svg:x1="13.161cm" svg:y1="-4.274cm" svg:x2="3.941cm" svg:y2="-4.417cm"><text:p/></draw:line><draw:frame text:anchor-type="paragraph" draw:z-index="39" draw:name="Cadre de texte 11" draw:style-name="gr14" draw:text-style-name="P10" svg:width="2.867cm" svg:height="0.976cm" svg:x="14.884cm" svg:y="-5.015cm"><draw:text-box><text:p><text:span text:style-name="T1">led0_r </text:span><text:span text:style-name="T7">et </text:span><text:span text:style-name="T1">led0_g </text:span><text:span text:style-name="T7">éteintes</text:span></text:p></draw:text-box></draw:frame>6)</text:p>
      <text:p text:style-name="P25"/>
      <text:p text:style-name="P25"><draw:line text:anchor-type="paragraph" draw:z-index="41" draw:name="Ligne 7" draw:style-name="gr3" draw:text-style-name="P7" svg:x1="6.179cm" svg:y1="3.52cm" svg:x2="9.299cm" svg:y2="3.497cm"><text:p text:style-name="P5"><text:span text:style-name="T1">end_counter</text:span></text:p><text:p text:style-name="P5"><text:span text:style-name="T1"/></text:p></draw:line><draw:line text:anchor-type="paragraph" draw:z-index="42" draw:name="Ligne 8" draw:style-name="gr3" draw:text-style-name="P5" svg:x1="2.094cm" svg:y1="3.54cm" svg:x2="3.078cm" svg:y2="3.559cm"><text:p text:style-name="P5">resetn <text:s text:c="19"/></text:p></draw:line><draw:custom-shape text:anchor-type="paragraph" draw:z-index="43" draw:name="Forme 14" draw:style-name="gr13" draw:text-style-name="P6" svg:width="3.088cm" svg:height="3.282cm" svg:x="9.299cm" svg:y="1.87cm"><text:p text:style-name="P5">FSM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5"/>
      <text:p text:style-name="P25"/>
      <text:p text:style-name="P25"><draw:custom-shape text:anchor-type="paragraph" draw:z-index="40" draw:name="Forme 13" draw:style-name="gr2" draw:text-style-name="P8" svg:width="3.102cm" svg:height="3.102cm" svg:x="3.078cm" svg:y="0.365cm"><text:p text:style-name="P7"><text:span text:style-name="T1">Counter_unit</text:span></text:p><draw:enhanced-geometry svg:viewBox="0 0 21600 21600" draw:type="rectangle" draw:enhanced-path="M 0 0 L 21600 0 21600 21600 0 21600 0 0 Z N"/></draw:custom-shape></text:p>
      <text:p text:style-name="P25"/>
      <text:p text:style-name="P25"><draw:line text:anchor-type="paragraph" draw:z-index="44" draw:name="Ligne horizontale 10" draw:style-name="gr4" draw:text-style-name="P7" svg:x1="12.386cm" svg:y1="0.483cm" svg:x2="14.917cm" svg:y2="0.508cm"><text:p text:style-name="P5"><text:span text:style-name="T1">led0_r</text:span></text:p><text:p text:style-name="P5"><text:span text:style-name="T1"/></text:p></draw:line></text:p>
      <text:p text:style-name="P25"><draw:line text:anchor-type="paragraph" draw:z-index="48" draw:name="Ligne 9" draw:style-name="gr17" draw:text-style-name="P5" svg:x1="7.592cm" svg:y1="0.599cm" svg:x2="7.585cm" svg:y2="4.321cm"><text:p/></draw:line></text:p>
      <text:p text:style-name="P25"><draw:line text:anchor-type="paragraph" draw:z-index="45" draw:name="Ligne horizontale 11" draw:style-name="gr4" draw:text-style-name="P7" svg:x1="12.386cm" svg:y1="0.603cm" svg:x2="14.917cm" svg:y2="0.628cm"><text:p text:style-name="P5"><text:span text:style-name="T1">led0_g</text:span></text:p><text:p text:style-name="P5"><text:span text:style-name="T1"/></text:p></draw:line></text:p>
      <text:p text:style-name="P25"/>
      <text:p text:style-name="P25"><draw:line text:anchor-type="paragraph" draw:z-index="49" draw:name="Ligne 10" draw:style-name="gr3" draw:text-style-name="P7" svg:x1="10.739cm" svg:y1="2.861cm" svg:x2="10.743cm" svg:y2="0.769cm"><text:p text:style-name="P5"><text:span text:style-name="T1">led <text:s text:c="2"/></text:span></text:p><text:p text:style-name="P5"><text:span text:style-name="T1"/></text:p></draw:line></text:p>
      <text:p text:style-name="P25"><draw:custom-shape text:anchor-type="paragraph" draw:z-index="47" draw:name="Forme 16" draw:style-name="gr11" draw:text-style-name="P8" svg:width="4.61cm" svg:height="1.544cm" svg:x="6.812cm" svg:y="2.374cm"><text:p text:style-name="P7"><text:span text:style-name="T7">LUT + registre 1bit</text:span></text:p><text:p text:style-name="P7"><text:span text:style-name="T1">led ← not led</text:span></text:p><draw:enhanced-geometry svg:viewBox="0 0 21600 21600" draw:type="rectangle" draw:enhanced-path="M 0 0 L 21600 0 21600 21600 0 21600 0 0 Z N"/></draw:custom-shap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<text:line-break/></text:p>
      <text:p text:style-name="P27">7)</text:p>
      <text:p text:style-name="P28"/>
      <text:p text:style-name="P29">Voici le process de la machine d’état.</text:p>
      <text:p text:style-name="P29"/>
      <text:p text:style-name="P30"><draw:frame draw:style-name="fr3" draw:name="Image6" text:anchor-type="char" svg:width="17cm" svg:height="8.913cm" draw:z-index="58"><draw:image xlink:href="Pictures/10000001000004D2000002873E980630.png" xlink:type="simple" xlink:show="embed" xlink:actuate="onLoad" draw:mime-type="image/png"/></draw:frame></text:p>
      <text:p text:style-name="P31">Le testbench de cette architecture est écrit dans le fichier <text:span text:style-name="T1">tb_led_</text:span><text:span text:style-name="T8">pilot</text:span><text:span text:style-name="T1">_q7.vhd.</text:span></text:p>
      <text:p text:style-name="P28"/>
      <text:p text:style-name="P28"><draw:frame draw:style-name="fr3" draw:name="Image2" text:anchor-type="char" svg:width="17cm" svg:height="3.669cm" draw:z-index="50"><draw:image xlink:href="Pictures/10000001000006020000014CC9E26622.png" xlink:type="simple" xlink:show="embed" xlink:actuate="onLoad" draw:mime-type="image/png"/></draw:frame></text:p>
      <text:p text:style-name="P32">Les signaux <text:span text:style-name="T1">current_state </text:span><text:span text:style-name="T7">et next_state sont à « </text:span><text:span text:style-name="T11">R</text:span><text:span text:style-name="T7">ouge » au début de la simulation.</text:span></text:p>
      <text:p text:style-name="P33">La led rouge clignote et la led verte est éteinte.</text:p>
      <text:p text:style-name="P33">Lorsque le bouton est préssé, <text:span text:style-name="T1">next_state </text:span>passe immédiatement à « <text:span text:style-name="T12">V</text:span>ert ».</text:p>
      <text:p text:style-name="P33">Un coup d’horloge après, c’est à <text:span text:style-name="T1">current_state </text:span>de passer à « <text:span text:style-name="T13">V</text:span>ert ». En même temps, la led verte s’allume.</text:p>
      <text:p text:style-name="P33">Le clignotement est calé sur le signal <text:span text:style-name="T1">led.</text:span></text:p>
      <text:p text:style-name="P32"><text:span text:style-name="T7">Ici, le bouton a été pressé pendant un niveau haut de </text:span><text:span text:style-name="T1">led, </text:span><text:span text:style-name="T7">c’est pour cela que la led verte s’allume imméd</text:span><text:span text:style-name="T11">i</text:span><text:span text:style-name="T7">atement et n’attends pas </text:span><text:span text:style-name="T1">end_counter.</text:span></text:p>
      <text:p text:style-name="P34"/>
      <text:p text:style-name="P35">Le bouton reste appuyé, donc lorsque la led verte a clignoté une fois, <text:span text:style-name="T14">next_state </text:span><text:span text:style-name="T15">passe à « Attente ».</text:span></text:p>
      <text:p text:style-name="P36">Current_state <text:span text:style-name="T7">passe ensuite à « Attente » et aucun led ne s’allume.</text:span></text:p>
      <text:p text:style-name="P37"/>
      <text:p text:style-name="P37">Lorsque le bouton est relâché, <text:span text:style-name="T1">next_state</text:span> puis <text:span text:style-name="T1">current_state </text:span>passent à « Rouge ».</text:p>
      <text:p text:style-name="P37">Une fois que <text:span text:style-name="T1">current_state </text:span>est à « Rouge », la led rouge commence à clignoter.</text:p>
      <text:p text:style-name="P38">Il y a simplement un décalage d’un coup d’horloge entre l’appui du bouton et la réaction des leds.</text:p>
      <text:p text:style-name="P28"/>
      <text:p text:style-name="P28"><draw:frame draw:style-name="fr3" draw:name="Image3" text:anchor-type="char" svg:width="17cm" svg:height="3.731cm" draw:z-index="51"><draw:image xlink:href="Pictures/10000001000005FF000001512F2CEBDF.png" xlink:type="simple" xlink:show="embed" xlink:actuate="onLoad" draw:mime-type="image/png"/></draw:frame><text:soft-page-break/></text:p>
      <text:p text:style-name="P28"/>
      <text:p text:style-name="P38">On teste à présent un appui court du bouton.</text:p>
      <text:p text:style-name="P38">Lorsque le bouton est pressé, <text:span text:style-name="T14">next_state</text:span><text:span text:style-name="T16"> puis </text:span><text:span text:style-name="T14">current_state </text:span><text:span text:style-name="T16">passent à « Vert ».</text:span></text:p>
      <text:p text:style-name="P39">Le bouton est relâché après un coup d’horloge, malgré cela l’état Vert persiste.</text:p>
      <text:p text:style-name="P39">Il faut que la led verte ait le temps de clignoter. <text:span text:style-name="T17">Pour cela on attends que </text:span><text:span text:style-name="T18">end_counter </text:span><text:span text:style-name="T17">et </text:span><text:span text:style-name="T18">led </text:span><text:span text:style-name="T17">soient à 1. C’est la condition d’une fin de clignotement.</text:span></text:p>
      <text:p text:style-name="P40">À ce moment, le bouton est déjà relâché donc <text:span text:style-name="T1">next_state </text:span>et <text:span text:style-name="T1">current_state </text:span>passent directement à l’état « Rouge » sans passer par « Attente ».</text:p>
      <text:p text:style-name="P40"/>
      <text:p text:style-name="P40"><draw:frame draw:style-name="fr3" draw:name="Image4" text:anchor-type="char" svg:width="17cm" svg:height="3.687cm" draw:z-index="56"><draw:image xlink:href="Pictures/10000001000005FB0000014C1AE4D171.png" xlink:type="simple" xlink:show="embed" xlink:actuate="onLoad" draw:mime-type="image/png"/></draw:frame></text:p>
      <text:p text:style-name="P40">À <text:span text:style-name="T19">noter que lorsque le bouton est appuyé pendant que la led rouge est allumée, le clignotement de la led verte ne sera pas « complet ». La led verte reste moins longtemps allumée que le temps d’un clignotement.</text:span></text:p>
      <text:p text:style-name="P40"/>
      <text:p text:style-name="P41">8)</text:p>
      <text:p text:style-name="P42">Voici l’architecture du module <text:span text:style-name="T1">led_driver.</text:span></text:p>
      <text:p text:style-name="P43"/>
      <text:p text:style-name="P40"/>
      <text:p text:style-name="P40"><draw:line text:anchor-type="paragraph" draw:z-index="63" draw:name="Ligne horizontale 9" draw:style-name="gr4" draw:text-style-name="P7" svg:x1="14.72cm" svg:y1="0.15cm" svg:x2="17.251cm" svg:y2="0.175cm"><text:p text:style-name="P5"><text:span text:style-name="T1">led0_r</text:span></text:p><text:p text:style-name="P5"><text:span text:style-name="T1"/></text:p></draw:line><draw:line text:anchor-type="paragraph" draw:z-index="61" draw:name="Ligne 12" draw:style-name="gr3" draw:text-style-name="P5" svg:x1="1.094cm" svg:y1="1.207cm" svg:x2="2.078cm" svg:y2="1.226cm"><text:p text:style-name="P5">resetn <text:s text:c="19"/></text:p></draw:line><draw:custom-shape text:anchor-type="paragraph" draw:z-index="59" draw:name="Forme 15" draw:style-name="gr2" draw:text-style-name="P8" svg:width="3.102cm" svg:height="3.102cm" svg:x="2.078cm" svg:y="-0.302cm"><text:p text:style-name="P7"><text:span text:style-name="T1">Counter_unit</text:span></text:p><draw:enhanced-geometry svg:viewBox="0 0 21600 21600" draw:type="rectangle" draw:enhanced-path="M 0 0 L 21600 0 21600 21600 0 21600 0 0 Z N"/></draw:custom-shape></text:p>
      <text:p text:style-name="P40"/>
      <text:p text:style-name="P28"/>
      <text:p text:style-name="P28"><draw:custom-shape text:anchor-type="paragraph" draw:z-index="69" draw:name="Forme 19" draw:style-name="gr18" draw:text-style-name="P6" svg:width="3.26cm" svg:height="1.28cm" draw:transform="rotate (-1.5688764646177) translate (14.8025555555556cm -2.00025cm)"><text:p text:style-name="P5">MUX</text:p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range-x-minimum="0" draw:handle-range-x-maximum="10800" draw:handle-position="$0 bottom" draw:handle-position-x="$0" draw:handle-position-y="bottom"/></draw:enhanced-geometry></draw:custom-shape></text:p>
      <text:p text:style-name="P28"/>
      <text:p text:style-name="P28"><draw:custom-shape text:anchor-type="paragraph" draw:z-index="71" draw:name="Forme 20" draw:style-name="gr19" draw:text-style-name="P8" svg:width="3.62cm" svg:height="1.544cm" svg:x="8.146cm" svg:y="1.274cm"><text:p text:style-name="P7"><text:span text:style-name="T7">registre 2bit</text:span></text:p><text:p text:style-name="P7"><text:span text:style-name="T1">color_reg</text:span></text:p><draw:enhanced-geometry svg:viewBox="0 0 21600 21600" draw:type="rectangle" draw:enhanced-path="M 0 0 L 21600 0 21600 21600 0 21600 0 0 Z N"/></draw:custom-shape><draw:custom-shape text:anchor-type="paragraph" draw:z-index="66" draw:name="Forme 18" draw:style-name="gr19" draw:text-style-name="P8" svg:width="3.62cm" svg:height="1.544cm" svg:x="8.146cm" svg:y="-2.06cm"><text:p text:style-name="P7"><text:span text:style-name="T7">LUT + registre 1bit</text:span></text:p><text:p text:style-name="P7"><text:span text:style-name="T1">led ← not led</text:span></text:p><draw:enhanced-geometry svg:viewBox="0 0 21600 21600" draw:type="rectangle" draw:enhanced-path="M 0 0 L 21600 0 21600 21600 0 21600 0 0 Z N"/></draw:custom-shape><draw:line text:anchor-type="paragraph" draw:z-index="64" draw:name="Ligne horizontale 13" draw:style-name="gr4" draw:text-style-name="P7" svg:x1="14.81cm" svg:y1="-1.498cm" svg:x2="17.251cm" svg:y2="-1.473cm"><text:p text:style-name="P5"><text:span text:style-name="T1">led0_g</text:span></text:p><text:p text:style-name="P5"><text:span text:style-name="T1"/></text:p></draw:line></text:p>
      <text:p text:style-name="P28"><draw:line text:anchor-type="paragraph" draw:z-index="70" draw:name="Ligne horizontale 15" draw:style-name="gr4" draw:text-style-name="P7" svg:x1="14.81cm" svg:y1="-1.164cm" svg:x2="17.251cm" svg:y2="-1.139cm"><text:p text:style-name="P5"><text:span text:style-name="T1">led0_b</text:span></text:p><text:p text:style-name="P5"><text:span text:style-name="T1"/></text:p></draw:line></text:p>
      <text:p text:style-name="P28"><draw:line text:anchor-type="paragraph" draw:z-index="72" draw:name="Ligne 15" draw:style-name="gr3" draw:text-style-name="P7" svg:x1="5.179cm" svg:y1="-2.221cm" svg:x2="8.146cm" svg:y2="-2.221cm"><text:p text:style-name="P5"><text:span text:style-name="T1">end_counter <text:s text:c="2"/></text:span></text:p><text:p text:style-name="P5"><text:span text:style-name="T1"/></text:p></draw:line><draw:line text:anchor-type="paragraph" draw:z-index="68" draw:name="Ligne 14" draw:style-name="gr3" draw:text-style-name="P7" svg:x1="11.765cm" svg:y1="-2.261cm" svg:x2="13.524cm" svg:y2="-2.261cm"><text:p text:style-name="P5"><text:span text:style-name="T1">led <text:s text:c="2"/></text:span></text:p><text:p text:style-name="P5"><text:span text:style-name="T1"/></text:p></draw:line></text:p>
      <text:p text:style-name="P28"/>
      <text:p text:style-name="P28"><draw:line text:anchor-type="paragraph" draw:z-index="65" draw:name="Ligne horizontale 14" draw:style-name="gr20" draw:text-style-name="P7" svg:x1="14.058cm" svg:y1="0.14cm" svg:x2="14.058cm" svg:y2="-2.088cm"><text:p/></draw:line></text:p>
      <text:p text:style-name="P28"/>
      <text:p text:style-name="P28"/>
      <text:p text:style-name="P28"><draw:line text:anchor-type="paragraph" draw:z-index="76" draw:name="Ligne 19" draw:style-name="gr21" draw:text-style-name="P5" svg:x1="13.88cm" svg:y1="-1.977cm" svg:x2="14.256cm" svg:y2="-2.309cm"><text:p text:style-name="P5"><text:s text:c="11"/>2</text:p></draw:line></text:p>
      <text:p text:style-name="P28"><draw:line text:anchor-type="paragraph" draw:z-index="90" draw:name="Ligne 31" draw:style-name="gr21" draw:text-style-name="P7" svg:x1="-0.069cm" svg:y1="0.307cm" svg:x2="10.024cm" svg:y2="0.441cm"><text:p text:style-name="P5"><text:span text:style-name="T1">update</text:span></text:p><text:p text:style-name="P5"><text:span text:style-name="T1"/></text:p></draw:line></text:p>
      <text:p text:style-name="P28"><draw:line text:anchor-type="paragraph" draw:z-index="75" draw:name="Ligne 18" draw:style-name="gr21" draw:text-style-name="P5" svg:x1="6.267cm" svg:y1="-1.853cm" svg:x2="6.643cm" svg:y2="-2.185cm"><text:p text:style-name="P5"><text:s text:c="11"/>2</text:p></draw:line><draw:line text:anchor-type="paragraph" draw:z-index="67" draw:name="Ligne 13" draw:style-name="gr3" draw:text-style-name="P7" svg:x1="0.191cm" svg:y1="-2.053cm" svg:x2="8.146cm" svg:y2="-2.009cm"><text:p text:style-name="P5"><text:span text:style-name="T1">color_code</text:span></text:p><text:p text:style-name="P5"><text:span text:style-name="T1"/></text:p></draw:line><draw:line text:anchor-type="paragraph" draw:z-index="74" draw:name="Ligne 17" draw:style-name="gr21" draw:text-style-name="P7" svg:x1="11.765cm" svg:y1="-2.295cm" svg:x2="14.058cm" svg:y2="-2.295cm"><text:p text:style-name="P5"><text:span text:style-name="T1">color_reg</text:span></text:p><text:p text:style-name="P5"><text:span text:style-name="T1"/></text:p></draw:line></text:p>
      <text:p text:style-name="P28"><draw:line text:anchor-type="paragraph" draw:z-index="60" draw:name="Ligne 11" draw:style-name="gr17" draw:text-style-name="P7" svg:x1="10.024cm" svg:y1="-0.532cm" svg:x2="10.045cm" svg:y2="-2.051cm"><text:p/></draw:line></text:p>
      <text:p text:style-name="P28"/>
      <text:p text:style-name="P28"/>
      <text:p text:style-name="P28"><draw:line text:anchor-type="paragraph" draw:z-index="73" draw:name="Ligne 16" draw:style-name="gr21" draw:text-style-name="P7" svg:x1="0.3cm" svg:y1="-1.993cm" svg:x2="10.045cm" svg:y2="-1.993cm"><text:p text:style-name="P5"><text:span text:style-name="T1">update</text:span></text:p><text:p text:style-name="P5"><text:span text:style-name="T1"/></text:p></draw:line><text:soft-page-break/></text:p>
      <text:p text:style-name="P28"/>
      <text:p text:style-name="P28"/>
      <text:p text:style-name="P44">9)</text:p>
      <text:p text:style-name="P45">Le module <text:span text:style-name="T1">led_driver </text:span><text:span text:style-name="T7">sera ins</text:span><text:span text:style-name="T20">t</text:span><text:span text:style-name="T7">an</text:span><text:span text:style-name="T20">c</text:span><text:span text:style-name="T7">ié dans l’architecture</text:span><text:span text:style-name="T1"> top_led_driver.</text:span></text:p>
      <text:p text:style-name="P46"/>
      <text:p text:style-name="P44"/>
      <text:p text:style-name="P44"><draw:custom-shape text:anchor-type="paragraph" draw:z-index="62" draw:name="Forme 17" draw:style-name="gr22" draw:text-style-name="P6" svg:width="2.236cm" svg:height="2.186cm" svg:x="4.191cm" svg:y="0.48cm"><text:p text:style-name="P5">FSM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4"><draw:custom-shape text:anchor-type="paragraph" draw:z-index="77" draw:name="Forme 21" draw:style-name="gr23" draw:text-style-name="P8" svg:width="3.821cm" svg:height="5.719cm" svg:x="11.25cm" svg:y="0.18cm"><text:p text:style-name="P7"><text:span text:style-name="T1">led_driver</text:span></text:p><draw:enhanced-geometry svg:viewBox="0 0 21600 21600" draw:type="rectangle" draw:enhanced-path="M 0 0 L 21600 0 21600 21600 0 21600 0 0 Z N"/></draw:custom-shape></text:p>
      <text:p text:style-name="P44"/>
      <text:p text:style-name="P44"><draw:line text:anchor-type="paragraph" draw:z-index="79" draw:name="Ligne 20" draw:style-name="gr3" draw:text-style-name="P7" svg:x1="0.411cm" svg:y1="0.132cm" svg:x2="4.09cm" svg:y2="0.132cm"><text:p text:style-name="P5"><text:span text:style-name="T1">bouton_0</text:span></text:p><text:p text:style-name="P5"><text:span text:style-name="T1"/></text:p></draw:line><draw:line text:anchor-type="paragraph" draw:z-index="80" draw:name="Ligne 21" draw:style-name="gr3" draw:text-style-name="P7" svg:x1="6.426cm" svg:y1="0.076cm" svg:x2="11.25cm" svg:y2="0.088cm"><text:p text:style-name="P5"><text:span text:style-name="T1">update</text:span></text:p><text:p text:style-name="P5"><text:span text:style-name="T1"/></text:p></draw:line><draw:line text:anchor-type="paragraph" draw:z-index="86" draw:name="Ligne 25" draw:style-name="gr3" draw:text-style-name="P7" svg:x1="15.071cm" svg:y1="1.162cm" svg:x2="16.285cm" svg:y2="1.162cm"><text:p text:style-name="P5"><text:span text:style-name="T1"><text:tab/></text:span><text:span text:style-name="T1"><text:tab/></text:span><text:span text:style-name="T1"><text:tab/></text:span><text:span text:style-name="T1">led0_r</text:span></text:p></draw:line><draw:line text:anchor-type="paragraph" draw:z-index="88" draw:name="Ligne 29" draw:style-name="gr3" draw:text-style-name="P7" svg:x1="15.071cm" svg:y1="2.163cm" svg:x2="16.285cm" svg:y2="2.163cm"><text:p text:style-name="P5"><text:span text:style-name="T1"><text:tab/></text:span><text:span text:style-name="T1"><text:tab/></text:span><text:span text:style-name="T1"><text:tab/></text:span><text:span text:style-name="T1">led0_g</text:span></text:p></draw:line><draw:line text:anchor-type="paragraph" draw:z-index="89" draw:name="Ligne 30" draw:style-name="gr3" draw:text-style-name="P7" svg:x1="15.071cm" svg:y1="3.163cm" svg:x2="16.285cm" svg:y2="3.163cm"><text:p text:style-name="P5"><text:span text:style-name="T1"><text:tab/></text:span><text:span text:style-name="T1"><text:tab/></text:span><text:span text:style-name="T1"><text:tab/></text:span><text:span text:style-name="T1">led0_b</text:span></text:p></draw:line></text:p>
      <text:p text:style-name="P44"/>
      <text:p text:style-name="P44"><draw:line text:anchor-type="paragraph" draw:z-index="87" draw:name="Ligne 28" draw:style-name="gr3" draw:text-style-name="P7" svg:x1="10.037cm" svg:y1="0.744cm" svg:x2="11.251cm" svg:y2="0.744cm"><text:p text:style-name="P5"><text:span text:style-name="T1">resetn</text:span><text:span text:style-name="T1"><text:tab/></text:span><text:span text:style-name="T1"><text:tab/></text:span><text:span text:style-name="T1"> <text:s text:c="10"/></text:span><text:span text:style-name="T1"><text:tab/></text:span><text:span text:style-name="T1"> <text:s text:c="7"/></text:span></text:p></draw:line></text:p>
      <text:p text:style-name="P44"><draw:custom-shape text:anchor-type="paragraph" draw:z-index="78" draw:name="Forme 22" draw:style-name="gr24" draw:text-style-name="P6" svg:width="3.26cm" svg:height="1.274cm" draw:transform="skewX (-0.0401425727958696) rotate (-1.5687019316925) translate (6.09247222222222cm 0.257527777777778cm)"><text:p text:style-name="P5">MUX</text:p>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range-x-minimum="0" draw:handle-range-x-maximum="10800" draw:handle-position="$0 bottom" draw:handle-position-x="$0" draw:handle-position-y="bottom"/></draw:enhanced-geometry></draw:custom-shape></text:p>
      <text:p text:style-name="P44"/>
      <text:p text:style-name="P44"><draw:line text:anchor-type="paragraph" draw:z-index="81" draw:name="Ligne 22" draw:style-name="gr3" draw:text-style-name="P7" svg:x1="3.605cm" svg:y1="0.072cm" svg:x2="4.819cm" svg:y2="0.072cm"><text:p text:style-name="P5"><text:span text:style-name="T1">Vert</text:span><text:span text:style-name="T1"><text:tab/></text:span><text:span text:style-name="T1"><text:tab/></text:span><text:span text:style-name="T1"><text:tab/></text:span><text:span text:style-name="T1"> <text:s text:c="2"/></text:span></text:p></draw:line></text:p>
      <text:p text:style-name="P44"><draw:line text:anchor-type="paragraph" draw:z-index="85" draw:name="Ligne 27" draw:style-name="gr3" draw:text-style-name="P7" svg:x1="6.1cm" svg:y1="0.459cm" svg:x2="11.251cm" svg:y2="0.508cm"><text:p text:style-name="P5"><text:span text:style-name="T1">color_code</text:span></text:p><text:p text:style-name="P5"><text:span text:style-name="T1"/></text:p></draw:line></text:p>
      <text:p text:style-name="P44"><draw:line text:anchor-type="paragraph" draw:z-index="82" draw:name="Ligne 23" draw:style-name="gr3" draw:text-style-name="P7" svg:x1="3.605cm" svg:y1="0.432cm" svg:x2="4.819cm" svg:y2="0.432cm"><text:p text:style-name="P5"><text:span text:style-name="T1">Bleu</text:span><text:span text:style-name="T1"><text:tab/></text:span><text:span text:style-name="T1"><text:tab/></text:span><text:span text:style-name="T1"><text:tab/></text:span><text:span text:style-name="T1"> <text:s text:c="2"/></text:span></text:p></draw:line></text:p>
      <text:p text:style-name="P44"/>
      <text:p text:style-name="P44"><draw:line text:anchor-type="paragraph" draw:z-index="83" draw:name="Ligne 24" draw:style-name="gr17" draw:text-style-name="P7" svg:x1="5.457cm" svg:y1="1.865cm" svg:x2="5.471cm" svg:y2="0.173cm"><text:p/></draw:line></text:p>
      <text:p text:style-name="P44"/>
      <text:p text:style-name="P44"/>
      <text:p text:style-name="P44"><draw:line text:anchor-type="paragraph" draw:z-index="84" draw:name="Ligne 26" draw:style-name="gr21" draw:text-style-name="P7" svg:x1="0.766cm" svg:y1="0.347cm" svg:x2="5.458cm" svg:y2="0.321cm"><text:p text:style-name="P5"><text:span text:style-name="T1">bouton_1</text:span></text:p><text:p text:style-name="P5"><text:span text:style-name="T1"/></text:p></draw:line></text:p>
      <text:p text:style-name="P44"/>
      <text:p text:style-name="P44"/>
      <text:p text:style-name="P47">La machine d’état pour le signal <text:span text:style-name="T1">update </text:span><text:span text:style-name="T7">a </text:span><text:span text:style-name="T21">3</text:span><text:span text:style-name="T7"> états. </text:span><text:span text:style-name="T22">L’état « Attente »</text:span><text:span text:style-name="T23"> permet </text:span><text:span text:style-name="T22">de remettre</text:span><text:span text:style-name="T23"> </text:span><text:span text:style-name="T24">update</text:span><text:span text:style-name="T23"> à 0 même si l</text:span><text:span text:style-name="T22">e </text:span><text:span text:style-name="T23">bouton_0 reste enfoncé.</text:span></text:p>
      <text:p text:style-name="P44"/>
      <text:p text:style-name="P44"><draw:frame text:anchor-type="paragraph" draw:z-index="101" draw:name="Cadre de texte 14" draw:style-name="gr14" draw:text-style-name="P10" svg:width="2.867cm" svg:height="0.976cm" svg:x="7.327cm" svg:y="0.356cm"><draw:text-box><text:p><text:span text:style-name="T1">update ← 1</text:span></text:p></draw:text-box></draw:frame></text:p>
      <text:p text:style-name="P44"/>
      <text:p text:style-name="P44"><draw:custom-shape text:anchor-type="paragraph" draw:z-index="91" draw:name="Forme 23" draw:style-name="gr15" draw:text-style-name="P6" svg:width="1.763cm" svg:height="1.763cm" svg:x="7.618cm" svg:y="0.042cm"><text:p text:style-name="P5">up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2" draw:name="Forme 24" draw:style-name="gr5" draw:text-style-name="P6" svg:width="1.763cm" svg:height="1.763cm" svg:x="2.298cm" svg:y="5.796cm"><text:p text:style-name="P5">dow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3" draw:name="Ligne verticale 3" draw:style-name="gr16" draw:text-style-name="P5" svg:x1="12.966cm" svg:y1="6.842cm" svg:x2="4.06cm" svg:y2="6.823cm"><text:p/></draw:line><draw:frame text:anchor-type="paragraph" draw:z-index="95" draw:name="Cadre de texte 9" draw:style-name="gr14" draw:text-style-name="P10" svg:width="2.867cm" svg:height="0.976cm" svg:x="-0.446cm" svg:y="6.816cm"><draw:text-box><text:p><text:span text:style-name="T1">update ← 0</text:span></text:p></draw:text-box></draw:frame><draw:custom-shape text:anchor-type="paragraph" draw:z-index="96" draw:name="Forme 25" draw:style-name="gr5" draw:text-style-name="P6" svg:width="1.763cm" svg:height="1.763cm" svg:x="12.966cm" svg:y="5.849cm"><text:p text:style-name="P5">Attent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8" draw:name="Ligne verticale 10" draw:style-name="gr6" draw:text-style-name="P9" svg:x1="9.243cm" svg:y1="1.381cm" svg:x2="13.527cm" svg:y2="5.897cm"><text:p text:style-name="P5"><text:span text:style-name="T2">1 coup d’horloge</text:span></text:p><text:p text:style-name="P5"><text:span text:style-name="T2"/></text:p></draw:line><draw:frame text:anchor-type="paragraph" draw:z-index="100" draw:name="Cadre de texte 13" draw:style-name="gr7" draw:text-style-name="P24" svg:width="2.52cm" svg:height="0.489cm" draw:transform="rotate (0.0167551608191456) translate (7.37834722222222cm 6.16479166666667cm)"><draw:text-box><text:p text:style-name="P5"><text:span text:style-name="T2">resetn</text:span></text:p></draw:text-box></draw:frame><draw:frame text:anchor-type="paragraph" draw:z-index="102" draw:name="Cadre de texte 15" draw:style-name="gr14" draw:text-style-name="P10" svg:width="2.867cm" svg:height="0.976cm" svg:x="15.217cm" svg:y="6.987cm"><draw:text-box><text:p><text:span text:style-name="T1">update ← 0</text:span></text:p></draw:text-box></draw:frame><draw:frame text:anchor-type="paragraph" draw:z-index="104" draw:name="Cadre de texte 16" draw:style-name="gr7" draw:text-style-name="P11" svg:width="3.275cm" svg:height="0.489cm" svg:x="7.25cm" svg:y="7.43cm"><draw:text-box><text:p><text:span text:style-name="T2">Bouton relâché</text:span></text:p></draw:text-box></draw:frame></text:p>
      <text:p text:style-name="P44"><draw:line text:anchor-type="paragraph" draw:z-index="94" draw:name="Ligne horizontale 16" draw:style-name="gr6" draw:text-style-name="P7" svg:x1="3.087cm" svg:y1="5.383cm" svg:x2="7.618cm" svg:y2="0.247cm"><text:p text:style-name="P5"><text:span text:style-name="T1">Bouton appuyé</text:span></text:p><text:p text:style-name="P5"><text:span text:style-name="T1"/></text:p></draw:line></text:p>
      <text:p text:style-name="P44"/>
      <text:p text:style-name="P44"><draw:line text:anchor-type="paragraph" draw:z-index="97" draw:name="Ligne verticale 9" draw:style-name="gr16" draw:text-style-name="P5" svg:x1="8.073cm" svg:y1="0.275cm" svg:x2="3.988cm" svg:y2="4.803cm"><text:p/></draw:line></text:p>
      <text:p text:style-name="P44"/>
      <text:p text:style-name="P44"><draw:frame text:anchor-type="paragraph" draw:z-index="99" draw:name="Cadre de texte 12" draw:style-name="gr7" draw:text-style-name="P24" svg:width="2.52cm" svg:height="0.489cm" draw:transform="rotate (0.834965514154087) translate (4.87009722222222cm 1.99848611111111cm)"><draw:text-box><text:p text:style-name="P5"><text:span text:style-name="T2">resetn</text:span></text:p></draw:text-box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draw:line text:anchor-type="paragraph" draw:z-index="103" draw:name="Ligne verticale 11" draw:style-name="gr9" draw:text-style-name="P9" svg:x1="13.161cm" svg:y1="0.092cm" svg:x2="3.664cm" svg:y2="0.178cm"><text:p/></draw:line></text:p>
      <text:p text:style-name="P44"/>
      <text:p text:style-name="P44"/>
      <text:p text:style-name="P44"/>
      <text:p text:style-name="P44"/>
      <text:p text:style-name="P44"/>
      <text:p text:style-name="P44"/>
      <text:p text:style-name="P48"><text:soft-page-break/>12)</text:p>
      <text:p text:style-name="P48"/>
      <text:p text:style-name="P49">En vert les entrées et sortie de l’architecture.</text:p>
      <text:p text:style-name="P49">En rose les signaux internes à <text:span text:style-name="T1">top_led_driver.</text:span></text:p>
      <text:p text:style-name="P50">En bleu les signaux internes à <text:span text:style-name="T1">led_driver.</text:span></text:p>
      <text:p text:style-name="P44"/>
      <text:p text:style-name="P44"><draw:frame draw:style-name="fr2" draw:name="Image7" text:anchor-type="char" svg:width="17cm" svg:height="4.247cm" draw:z-index="105"><draw:image xlink:href="Pictures/1000000100000715000001C570AB7380.png" xlink:type="simple" xlink:show="embed" xlink:actuate="onLoad" draw:mime-type="image/png"/></draw:frame></text:p>
      <text:p text:style-name="P51">Les signaux <text:span text:style-name="T1">current_state</text:span><text:span text:style-name="T7"> et </text:span><text:span text:style-name="T1">next_state</text:span><text:span text:style-name="T7"> commencent à « down »</text:span></text:p>
      <text:p text:style-name="P52"><text:span text:style-name="T1">color_code</text:span> est à 11<text:span text:style-name="T25">2</text:span><text:span text:style-name="T26"> </text:span>(led bleue) car le bouton 1 n’est pas pressé.</text:p>
      <text:p text:style-name="P53"><text:span text:style-name="T1">color_reg</text:span> est à 00<text:span text:style-name="T25">2</text:span> car c’est sa valeur par défaut après le reset.</text:p>
      <text:p text:style-name="P52">À 410 ns, le bouton 0 est pressé. <text:span text:style-name="T1">next_state</text:span> passe alors à l’état « up » et un coup d’horloge après, c’est <text:span text:style-name="T1">current_state</text:span> qui passe à « up ».</text:p>
      <text:p text:style-name="P53">Au même instant, le signal <text:span text:style-name="T1">update</text:span> est lancé. <text:span text:style-name="T1">color_reg</text:span> se mets alors à jour avec la valeur de <text:span text:style-name="T1">color_code</text:span>, soit <text:span text:style-name="T27">11</text:span><text:span text:style-name="T25">2</text:span><text:span text:style-name="T27"> (led bleue)</text:span></text:p>
      <text:p text:style-name="P52">Les signaux <text:span text:style-name="T1">current_state</text:span> et <text:span text:style-name="T1">next_state</text:span> ne restent qu’un seul coup d’horloge à « up ». Ils passent tout deux à l’état « attente ».</text:p>
      <text:p text:style-name="P54">On peut voir que la led bleue clignote car elle s’allument à 600 ns puis s’éteint.</text:p>
      <text:p text:style-name="P55">Lorsque le bouton 0 est relâché, <text:span text:style-name="T1">next_state</text:span> puis <text:span text:style-name="T1">current state</text:span> passent à l’état « down ».</text:p>
      <text:p text:style-name="P44"/>
      <text:p text:style-name="P44"><draw:frame draw:style-name="fr2" draw:name="Image8" text:anchor-type="char" svg:width="17cm" svg:height="4.251cm" draw:z-index="106"><draw:image xlink:href="Pictures/100000010000071B000001C78D96C3D2.png" xlink:type="simple" xlink:show="embed" xlink:actuate="onLoad" draw:mime-type="image/png"/></draw:frame></text:p>
      <text:p text:style-name="P56">La led bleue continue de clignot<text:span text:style-name="T28">er</text:span> même après avoir lâché le bouton 0.</text:p>
      <text:p text:style-name="P56">Ensuite le bouton 1 est pressé et <text:span text:style-name="T1">color_code</text:span> change à 10<text:span text:style-name="T29">2</text:span> (<text:span text:style-name="T30">led verte).</text:span></text:p>
      <text:p text:style-name="P57">La led bleue clignote toujours car le bouton 0 n’est pas encore appuyé.</text:p>
      <text:p text:style-name="P57">Lorsque celui-ci est pressé, next_state suivit de current_state passent à « up » pour un cycle d’horloge.</text:p>
      <text:p text:style-name="P57">Le signal <text:span text:style-name="T1">update</text:span> est envoyé et <text:span text:style-name="T1">color_reg</text:span> peut alors se mettre à jour.</text:p>
      <text:p text:style-name="P57">C’est maintenant la led verte qui clignote.</text:p>
      <text:p text:style-name="P57">Elle va encore clignoter quand le bouton 0 est relâché puis le bouton 1.</text:p>
      <text:p text:style-name="P57">Tant que le bouton 0 n’est pas pressé à nouveau, la led verte continuera de clignoter.</text:p>
      <text:p text:style-name="P44"/>
      <text:p text:style-name="P44"/>
      <text:p text:style-name="P44"/>
      <text:p text:style-name="P44"/>
      <text:p text:style-name="P44"/>
      <text:p text:style-name="P44"/>
      <text:p text:style-name="P44"><draw:frame draw:style-name="fr3" draw:name="Image9" text:anchor-type="char" svg:width="17cm" svg:height="4.307cm" draw:z-index="107"><draw:image xlink:href="Pictures/1000000100000717000001CC3483B520.png" xlink:type="simple" xlink:show="embed" xlink:actuate="onLoad" draw:mime-type="image/png"/></draw:frame><text:soft-page-break/></text:p>
      <text:p text:style-name="P57">Après cela, on teste un appui court sur le bouton 0.</text:p>
      <text:p text:style-name="P57">Pour bien observer le changement d’état, on peut se placer à un moment où la led verte est allumée.</text:p>
      <text:p text:style-name="P57">Le bouton 0 est alors pressé seulement pendant un cycle d’horloge.</text:p>
      <text:p text:style-name="P57">Les signaux <text:span text:style-name="T1">next_state</text:span> et c<text:span text:style-name="T1">urrent_state</text:span> passent à « up ». Ensuite, ils passent tout de même par l’état « attente » pendant un cycle. Cela ne change pas le comportement des leds.</text:p>
      <text:p text:style-name="P57">Après le signal <text:span text:style-name="T1">update, color_reg</text:span> est mis à jour et <text:span text:style-name="T31">la led passe du vert au bleu.</text:span></text:p>
      <text:p text:style-name="P58">Il y a une latence de deux cycles d’horloge entre l’appui du bouton et la réaction des leds.</text:p>
      <text:p text:style-name="P57"/>
      <text:p text:style-name="P57"/>
      <text:p text:style-name="P59">13)</text:p>
      <text:p text:style-name="P60">Avant la synthèse, on connecte les entrées et sorti de l’architecture aux port de la puce.</text:p>
      <text:p text:style-name="P60">Pour cela on décommente et renomme les lignes suivantes dans le fichier de contrainte.</text:p>
      <text:p text:style-name="P60"/>
      <text:p text:style-name="P60"><draw:frame draw:style-name="fr2" draw:name="Image11" text:anchor-type="char" svg:width="17cm" svg:height="5.26cm" draw:z-index="109"><draw:image xlink:href="Pictures/100000010000037C00000114B37906B8.png" xlink:type="simple" xlink:show="embed" xlink:actuate="onLoad" draw:mime-type="image/png"/></draw:frame></text:p>
      <text:p text:style-name="P59"/>
      <text:p text:style-name="P61">Voici le schematic du module <text:span text:style-name="T1">led_driver.</text:span></text:p>
      <text:p text:style-name="P59"><draw:frame draw:style-name="fr4" draw:name="Image10" text:anchor-type="char" svg:width="12.271cm" svg:height="7.084cm" draw:z-index="108"><draw:image xlink:href="Pictures/1000000100000533000002F8F535D2E1.png" xlink:type="simple" xlink:show="embed" xlink:actuate="onLoad" draw:mime-type="image/png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7"/>
      <text:p text:style-name="P57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59">En rouge les 2 LUT et les 2 registre de <text:span text:style-name="T1">color_reg. </text:span><text:span text:style-name="T7">En bleu le registre de </text:span><text:span text:style-name="T1">led_reg </text:span><text:span text:style-name="T7">qui prend en entrée le signal </text:span><text:span text:style-name="T1">end_counter </text:span><text:span text:style-name="T7">provenant du compteur.</text:span></text:p>
      <text:p text:style-name="P62">Le multiplexeur du schémas RTL pour sélectionner la led à faire clignoter, est remplacé par trois LUT ; une par led.</text:p>
      <text:p text:style-name="P63"/>
      <text:p text:style-name="P63"/>
      <text:p text:style-name="P63">Ci dessous, l’architecture de <text:span text:style-name="T1">top_led_driver.</text:span></text:p>
      <text:p text:style-name="P63"/>
      <text:p text:style-name="P63"><draw:frame draw:style-name="fr5" draw:name="Image12" text:anchor-type="char" svg:width="18.791cm" svg:height="5.424cm" draw:z-index="110"><draw:image xlink:href="Pictures/1000000100000602000001BC4E3E36FB.png" xlink:type="simple" xlink:show="embed" xlink:actuate="onLoad" draw:mime-type="image/png"/></draw:frame></text:p>
      <text:p text:style-name="P63"/>
      <text:p text:style-name="P63">En rouge les 2 LUT et les 2 registres de la machine d’état. En bleu le module <text:span text:style-name="T1">led_driver.</text:span></text:p>
      <text:p text:style-name="P63">On remarque que l’outil a fait une simplification sur le mutiplexeur entre le bouton 1 et <text:span text:style-name="T1">color_code.</text:span></text:p>
      <text:p text:style-name="P64"/>
      <text:p text:style-name="P64"/>
      <text:p text:style-name="P64"><draw:frame draw:style-name="fr5" draw:name="Image13" text:anchor-type="char" svg:width="8.149cm" svg:height="6.879cm" draw:z-index="111"><draw:image xlink:href="Pictures/1000000100000134000001047638CA1A.png" xlink:type="simple" xlink:show="embed" xlink:actuate="onLoad" draw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5">Le rapport d’utilisation montre que 10 registres et 13 LUTs sont utilisés.</text:p>
      <text:p text:style-name="P65"><text:span text:style-name="T32">6</text:span> LUTs et 5 registres sont occupés par le compteur.</text:p>
      <text:p text:style-name="P65">5 LUTs et 3 registre pour <text:span text:style-name="T1">led_driver.</text:span></text:p>
      <text:p text:style-name="P66">2 LUTs et 2 registre pour <text:span text:style-name="T1">top_led_driver.</text:span></text:p>
      <text:p text:style-name="P67"/>
      <text:p text:style-name="P68">Les schematics et l’utilisation matériel sont cohérent avec les schémas RTL établis avant le codage VHDL.</text:p>
      <text:p text:style-name="P68"/>
      <text:p text:style-name="P69"/>
      <text:p text:style-name="P70">14)</text:p>
      <text:p text:style-name="P69">Après implémentation, le rapport de timing donne des TNS et THS nuls.</text:p>
      <text:p text:style-name="P69">Le chemin critique a un slack de 8,328ns. L’horloge étant réglée sur 100MHz, elle a une période de 10ns.</text:p>
      <text:p text:style-name="P71"><text:span text:style-name="T33">Le rapport montre que l</text:span>e chemin critique a un <text:span text:style-name="T33">délais total</text:span> de 1,714ns.</text:p>
      <text:p text:style-name="P72">Or 1,714 + 8,328 = 10,042 ns.</text:p>
      <text:p text:style-name="P73">Je ne sais pas à quoi correspondent ces 42µs en plus par rapport à la période de l’horloge.</text:p>
      <text:p text:style-name="P74">Vivado fait peut être une approximation dans ses calculs qui conduisent à ces 42µs.</text:p>
      <text:p text:style-name="P69"/>
      <text:p text:style-name="P75"><draw:frame draw:style-name="fr2" draw:name="Image14" text:anchor-type="char" svg:width="17cm" svg:height="4.875cm" draw:z-index="112"><draw:image xlink:href="Pictures/1000000100000605000001BACE77DABC.png" xlink:type="simple" xlink:show="embed" xlink:actuate="onLoad" draw:mime-type="image/png"/></draw:frame><text:s/></text:p>
      <text:p text:style-name="P76">Le chemin critique reboucle sur lui-même. Il part et arrive à un registre de la machine d’état.</text:p>
      <text:p text:style-name="P77">Celui-ci est en fait contenu dans une seule slice. Il fait une boucle entre un registre et une LUT de la même slice.</text:p>
      <text:p text:style-name="P76"/>
      <text:p text:style-name="P76"><draw:frame draw:style-name="fr5" draw:name="Image15" text:anchor-type="char" svg:width="5.491cm" svg:height="5.159cm" draw:z-index="113"><draw:image xlink:href="Pictures/10000001000002220000020125C29678.png" xlink:type="simple" xlink:show="embed" xlink:actuate="onLoad" draw:mime-type="image/png"/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78">15)</text:p>
      <text:p text:style-name="P78"/>
      <text:p text:style-name="P78">Le bitstream est généré correctement mais je n’ai pas encore la carte pour vérifier l’architecture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9T10:54:46.775692870</meta:creation-date>
    <dc:date>2026-07-13T16:43:27.627476653</dc:date>
    <meta:editing-duration>PT15H31M28S</meta:editing-duration>
    <meta:editing-cycles>76</meta:editing-cycles>
    <meta:generator>LibreOffice/26.2.4.2$Linux_X86_64 LibreOffice_project/3346a99e6b841765b75a9b29714a5b95c6761ce3</meta:generator>
    <meta:document-statistic meta:table-count="0" meta:image-count="15" meta:object-count="0" meta:page-count="10" meta:paragraph-count="104" meta:word-count="1342" meta:character-count="7426" meta:non-whitespace-character-count="6180"/>
  </office:meta>
</office:document-meta>
</file>