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5000002896574AADB.png" manifest:media-type="image/png"/>
  <manifest:file-entry manifest:full-path="Pictures/100000010000035700000039ADEAC0C0.png" manifest:media-type="image/png"/>
  <manifest:file-entry manifest:full-path="Pictures/100000010000036E000000E03FD3FDC5.png" manifest:media-type="image/png"/>
  <manifest:file-entry manifest:full-path="Pictures/10000001000003530000024EB804631B.png" manifest:media-type="image/png"/>
  <manifest:file-entry manifest:full-path="Pictures/1000000100000139000000EB31369F5C.png" manifest:media-type="image/png"/>
  <manifest:file-entry manifest:full-path="Pictures/10000001000001C4000000E5A2020FC9.png" manifest:media-type="image/png"/>
  <manifest:file-entry manifest:full-path="Pictures/10000001000005FF0000014A6B2327E8.png" manifest:media-type="image/png"/>
  <manifest:file-entry manifest:full-path="Pictures/100000010000017C000000388C5FC9CA.png" manifest:media-type="image/png"/>
  <manifest:file-entry manifest:full-path="Pictures/1000000100000613000002A2CB6AE680.png" manifest:media-type="image/png"/>
  <manifest:file-entry manifest:full-path="Pictures/1000000100000350000000A1099476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5040" officeooo:paragraph-rsid="00185040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fo:font-weight="normal" officeooo:rsid="00185040" officeooo:paragraph-rsid="00185040" style:font-weight-asian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style:font-name="Liberation Serif" fo:font-weight="normal" officeooo:rsid="00185040" officeooo:paragraph-rsid="00185040" style:font-name-asian="Noto Serif CJK SC" style:font-weight-asian="normal" style:font-name-complex="Noto Sans Devanagari1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Liberation Serif" fo:font-weight="normal" officeooo:rsid="002fc7b6" officeooo:paragraph-rsid="002fc7b6" style:font-name-asian="Noto Serif CJK SC" style:font-weight-asian="normal" style:font-name-complex="Noto Sans Devanagari1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0185040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left" style:justify-single-word="false"/>
      <style:text-properties fo:font-weight="normal" officeooo:rsid="001e060e" officeooo:paragraph-rsid="001e060e" style:font-weight-asian="normal" style:font-weight-complex="normal"/>
    </style:style>
    <style:style style:name="P11" style:family="paragraph" style:parent-style-name="Standard">
      <style:paragraph-properties fo:text-align="left" style:justify-single-word="false"/>
      <style:text-properties fo:font-weight="normal" officeooo:rsid="0021748a" officeooo:paragraph-rsid="0021748a" style:font-weight-asian="normal" style:font-weight-complex="normal"/>
    </style:style>
    <style:style style:name="P12" style:family="paragraph" style:parent-style-name="Standard">
      <style:paragraph-properties fo:margin-top="0cm" fo:margin-bottom="0.499cm" style:contextual-spacing="false" fo:text-align="left" style:justify-single-word="false"/>
      <style:text-properties fo:font-weight="normal" officeooo:rsid="0024f6a4" officeooo:paragraph-rsid="002c8c49" style:font-weight-asian="normal" style:font-weight-complex="normal"/>
    </style:style>
    <style:style style:name="P13" style:family="paragraph" style:parent-style-name="Standard">
      <style:paragraph-properties fo:margin-top="0cm" fo:margin-bottom="0.499cm" style:contextual-spacing="false" fo:text-align="left" style:justify-single-word="false"/>
      <style:text-properties fo:font-size="11pt" fo:font-style="italic" officeooo:paragraph-rsid="0026e3bc" style:font-size-asian="11pt" style:font-style-asian="italic" style:font-size-complex="11pt" style:font-style-complex="italic"/>
    </style:style>
    <style:style style:name="P14" style:family="paragraph" style:parent-style-name="Text_20_body">
      <style:text-properties fo:font-style="normal" officeooo:rsid="0024f6a4" officeooo:paragraph-rsid="0024f6a4" style:font-style-asian="normal" style:font-style-complex="normal"/>
    </style:style>
    <style:style style:name="P15" style:family="paragraph" style:parent-style-name="Text_20_body">
      <style:text-properties officeooo:rsid="00277865" officeooo:paragraph-rsid="00277865"/>
    </style:style>
    <style:style style:name="P16" style:family="paragraph" style:parent-style-name="Standard">
      <style:paragraph-properties fo:text-align="left" style:justify-single-word="false"/>
      <style:text-properties fo:font-weight="normal" officeooo:rsid="00185040" officeooo:paragraph-rsid="00277865" style:font-weight-asian="normal" style:font-weight-complex="normal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 fo:font-style="italic" style:font-style-asian="italic" style:font-style-complex="italic"/>
    </style:style>
    <style:style style:name="P19" style:family="paragraph" style:parent-style-name="Standard">
      <style:paragraph-properties fo:margin-top="0cm" fo:margin-bottom="0.499cm" style:contextual-spacing="false" fo:text-align="left" style:justify-single-word="false"/>
      <style:text-properties fo:font-weight="normal" officeooo:rsid="0028d9d0" officeooo:paragraph-rsid="0028d9d0" style:font-weight-asian="normal" style:font-weight-complex="normal"/>
    </style:style>
    <style:style style:name="P20" style:family="paragraph" style:parent-style-name="Text_20_body">
      <style:text-properties fo:font-size="11pt" style:font-size-asian="11pt" style:font-size-complex="11pt"/>
    </style:style>
    <style:style style:name="P21" style:family="paragraph" style:parent-style-name="Text_20_body">
      <style:text-properties officeooo:rsid="002a94a4" officeooo:paragraph-rsid="002a94a4"/>
    </style:style>
    <style:style style:name="P22" style:family="paragraph" style:parent-style-name="Text_20_body">
      <style:text-properties officeooo:rsid="002c8c49" officeooo:paragraph-rsid="002c8c49"/>
    </style:style>
    <style:style style:name="P23" style:family="paragraph" style:parent-style-name="Text_20_body">
      <style:paragraph-properties fo:break-before="page"/>
      <style:text-properties officeooo:rsid="002c8c49" officeooo:paragraph-rsid="002c8c49"/>
    </style:style>
    <style:style style:name="P24" style:family="paragraph" style:parent-style-name="Text_20_body">
      <style:text-properties fo:font-style="normal" officeooo:rsid="002c8c49" officeooo:paragraph-rsid="002c8c49" style:font-style-asian="normal" style:font-style-complex="normal"/>
    </style:style>
    <style:style style:name="P25" style:family="paragraph" style:parent-style-name="Text_20_body">
      <style:text-properties fo:font-style="normal" officeooo:rsid="0030a06b" officeooo:paragraph-rsid="0030a06b" style:font-style-asian="normal" style:font-style-complex="normal"/>
    </style:style>
    <style:style style:name="P26" style:family="paragraph" style:parent-style-name="Text_20_body">
      <style:text-properties fo:font-style="normal" officeooo:rsid="002de268" officeooo:paragraph-rsid="002de268" style:font-style-asian="normal" style:font-style-complex="normal"/>
    </style:style>
    <style:style style:name="P27" style:family="paragraph" style:parent-style-name="Text_20_body">
      <style:paragraph-properties fo:text-align="left" style:justify-single-word="false"/>
      <style:text-properties fo:font-style="normal" officeooo:rsid="002de268" officeooo:paragraph-rsid="002de268" style:font-style-asian="normal" style:font-style-complex="normal"/>
    </style:style>
    <style:style style:name="P28" style:family="paragraph" style:parent-style-name="Standard">
      <style:paragraph-properties fo:text-align="left" style:justify-single-word="false"/>
      <style:text-properties fo:font-weight="normal" officeooo:rsid="0031b8e6" officeooo:paragraph-rsid="0031b8e6" style:font-weight-asian="normal" style:font-weight-complex="normal"/>
    </style:style>
    <style:style style:name="P29" style:family="paragraph" style:parent-style-name="Text_20_body">
      <style:paragraph-properties fo:text-align="left" style:justify-single-word="false"/>
      <style:text-properties fo:font-style="normal" officeooo:rsid="0032a45f" officeooo:paragraph-rsid="0032a45f" style:font-style-asian="normal" style:font-style-complex="normal"/>
    </style:style>
    <style:style style:name="P30" style:family="paragraph" style:parent-style-name="Standard">
      <style:paragraph-properties fo:margin-top="0cm" fo:margin-bottom="0.499cm" style:contextual-spacing="false" fo:text-align="left" style:justify-single-word="false"/>
      <style:text-properties officeooo:paragraph-rsid="0021748a"/>
    </style:style>
    <style:style style:name="P31" style:family="paragraph" style:parent-style-name="Text_20_body">
      <style:text-properties fo:font-style="normal" officeooo:rsid="00384bbc" officeooo:paragraph-rsid="00384bbc" style:font-style-asian="normal" style:font-style-complex="normal"/>
    </style:style>
    <style:style style:name="P32" style:family="paragraph" style:parent-style-name="Text_20_body">
      <style:text-properties fo:font-style="normal" officeooo:rsid="003882fa" officeooo:paragraph-rsid="003882fa" style:font-style-asian="normal" style:font-style-complex="normal"/>
    </style:style>
    <style:style style:name="P33" style:family="paragraph" style:parent-style-name="Text_20_body">
      <style:text-properties fo:font-style="normal" officeooo:rsid="003a74cc" officeooo:paragraph-rsid="003a74cc" style:font-style-asian="normal" style:font-style-complex="normal"/>
    </style:style>
    <style:style style:name="P34" style:family="paragraph" style:parent-style-name="Text_20_body">
      <style:paragraph-properties fo:text-align="left" style:justify-single-word="false"/>
      <style:text-properties fo:font-style="normal" officeooo:rsid="003882fa" officeooo:paragraph-rsid="003882fa" style:font-style-asian="normal" style:font-style-complex="normal"/>
    </style:style>
    <style:style style:name="P35" style:family="paragraph" style:parent-style-name="Text_20_body">
      <style:paragraph-properties fo:text-align="left" style:justify-single-word="false"/>
      <style:text-properties fo:font-style="normal" officeooo:rsid="003b4fa6" officeooo:paragraph-rsid="003b4fa6" style:font-style-asian="normal" style:font-style-complex="normal"/>
    </style:style>
    <style:style style:name="P36" style:family="paragraph" style:parent-style-name="Standard">
      <style:paragraph-properties fo:text-align="left" style:justify-single-word="false"/>
      <style:text-properties fo:font-size="11pt" fo:font-style="italic" fo:font-weight="normal" officeooo:rsid="0021748a" officeooo:paragraph-rsid="0021748a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left" style:justify-single-word="false"/>
      <style:text-properties fo:font-style="italic" fo:font-weight="normal" officeooo:rsid="0021748a" officeooo:paragraph-rsid="0021748a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left" style:justify-single-word="false"/>
      <style:text-properties fo:font-style="normal" fo:font-weight="normal" officeooo:rsid="003d2b8e" officeooo:paragraph-rsid="003d2b8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left" style:justify-single-word="false"/>
      <style:text-properties fo:font-weight="normal" officeooo:rsid="003d2b8e" officeooo:paragraph-rsid="003d2b8e" style:font-weight-asian="normal" style:font-weight-complex="normal"/>
    </style:style>
    <style:style style:name="P40" style:family="paragraph" style:parent-style-name="Standard">
      <style:paragraph-properties fo:text-align="left" style:justify-single-word="false"/>
      <style:text-properties fo:font-weight="normal" officeooo:rsid="003e1e0c" officeooo:paragraph-rsid="003e1e0c" style:font-weight-asian="normal" style:font-weight-complex="normal"/>
    </style:style>
    <style:style style:name="P41" style:family="paragraph" style:parent-style-name="Standard">
      <style:paragraph-properties fo:text-align="left" style:justify-single-word="false"/>
      <style:text-properties fo:font-weight="normal" officeooo:rsid="003ebed8" officeooo:paragraph-rsid="003ebed8" style:font-weight-asian="normal" style:font-weight-complex="normal"/>
    </style:style>
    <style:style style:name="P42" style:family="paragraph" style:parent-style-name="Standard">
      <style:paragraph-properties fo:margin-top="0cm" fo:margin-bottom="0.499cm" style:contextual-spacing="false" fo:text-align="left" style:justify-single-word="false"/>
      <style:text-properties fo:font-weight="normal" officeooo:rsid="003ebed8" officeooo:paragraph-rsid="003ebed8" style:font-weight-asian="normal" style:font-weight-complex="normal"/>
    </style:style>
    <style:style style:name="P43" style:family="paragraph" style:parent-style-name="Standard">
      <style:paragraph-properties fo:text-align="left" style:justify-single-word="false"/>
      <style:text-properties fo:font-weight="normal" officeooo:rsid="003ff17d" officeooo:paragraph-rsid="003ff17d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position="0% 100%"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5" style:family="text">
      <style:text-properties style:text-position="0% 100%" style:font-name="Liberation Serif" style:font-name-asian="Noto Serif CJK SC" style:font-name-complex="Noto Sans Devanagari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officeooo:rsid="001f7bfa"/>
    </style:style>
    <style:style style:name="T9" style:family="text">
      <style:text-properties officeooo:rsid="0020dcec"/>
    </style:style>
    <style:style style:name="T10" style:family="text">
      <style:text-properties officeooo:rsid="0024d797"/>
    </style:style>
    <style:style style:name="T11" style:family="text">
      <style:text-properties officeooo:rsid="0043a58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3a580" style:font-style-asian="normal" style:font-style-complex="normal"/>
    </style:style>
    <style:style style:name="T14" style:family="text">
      <style:text-properties officeooo:rsid="0034b05b"/>
    </style:style>
    <style:style style:name="T15" style:family="text">
      <style:text-properties officeooo:rsid="0032a45f"/>
    </style:style>
    <style:style style:name="T16" style:family="text">
      <style:text-properties officeooo:rsid="003cac1d"/>
    </style:style>
    <style:style style:name="T17" style:family="text">
      <style:text-properties officeooo:rsid="003eb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73cm, 0.2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9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d1d75" draw:marker-start-width="0.503cm" draw:marker-end-width="0.503cm" draw:textarea-horizontal-align="center" draw:textarea-vertical-align="middle" fo:padding-top="0.049cm" fo:padding-bottom="0.049cm" fo:padding-left="0.049cm" fo:padding-right="0.049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1.86cm" fo:min-width="15.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8d1d75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8d1d75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8d1d75" draw:marker-end="Arrow" draw:marker-end-width="0.35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397cm" fo:min-width="3.35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svg:stroke-color="#8d1d75" draw:marker-end="Arrow" draw:marker-end-width="0.35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357cm" fo:min-width="3.35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e6e905" draw:marker-start-width="0.503cm" draw:marker-end-width="0.503cm" draw:fill-color="#ffffff" draw:textarea-horizontal-align="justify" draw:textarea-vertical-align="middle" draw:auto-grow-height="false" fo:min-height="0.818cm" fo:min-width="0.818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1.39cm" fo:min-width="1.39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1.86cm" fo:min-width="15.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334cm" fo:min-width="3.35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e6e905" draw:marker-start-width="0.503cm" draw:marker-end-width="0.503cm" draw:fill-color="#ffffff" draw:textarea-horizontal-align="justify" draw:textarea-vertical-align="middle" draw:auto-grow-height="false" fo:min-height="0.72cm" fo:min-width="0.7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944cm" fo:min-width="2.485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1.291cm" fo:min-width="1.291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– Compteurs</text:p>
      <text:p text:style-name="P1"/>
      <text:p text:style-name="P2">1) </text:p>
      <text:p text:style-name="P2">2 secondes correspondent à 200 000 000 périodes d’horloge <text:s/>à 100MHz.</text:p>
      <text:p text:style-name="P2">Log<text:span text:style-name="T1">2</text:span><text:span text:style-name="T2">(2x10</text:span><text:span text:style-name="T3">8</text:span><text:span text:style-name="T2">)</text:span><text:span text:style-name="T4">≈</text:span><text:span text:style-name="T5">27,8</text:span></text:p>
      <text:p text:style-name="P3">Donc pour coder 2x10<text:span text:style-name="T3">8</text:span><text:span text:style-name="T2"> nous avons besoin d’au moins 28 bits.</text:span></text:p>
      <text:p text:style-name="P3"/>
      <text:p text:style-name="P4">Pour rendre la simulation plus rapide, j’abaisse arbitrairement le seuil à 20 périodes d’horloge. Les registres restent calibrés sur 28bits.</text:p>
      <text:p text:style-name="P2"/>
      <text:p text:style-name="P2">2, 3)</text:p>
      <text:p text:style-name="P5"><draw:custom-shape text:anchor-type="paragraph" draw:z-index="0" draw:name="Forme 1" draw:style-name="gr2" draw:text-style-name="P7" svg:width="15.4cm" svg:height="11.96cm" svg:x="0.928cm" svg:y="0.605cm"><text:p text:style-name="Frame_20_contents"><draw:line text:anchor-type="paragraph" draw:z-index="58" draw:name="Ligne 23" draw:style-name="gr1" draw:text-style-name="P6" svg:x1="7.474cm" svg:y1="-0.478cm" svg:x2="7.814cm" svg:y2="-0.755cm"><text:p text:style-name="P6"><text:s/><text:s/><text:s/><text:s/><text:s/><text:s/><text:s/><text:s/><text:s/><text:s/><text:s/>28</text:p></draw:line></text:p><draw:enhanced-geometry svg:viewBox="0 0 21600 21600" draw:type="rectangle" draw:enhanced-path="M 0 0 L 21600 0 21600 21600 0 21600 0 0 Z N"/></draw:custom-shape></text:p>
      <text:p text:style-name="P2"><draw:line text:anchor-type="paragraph" draw:z-index="17" draw:name="Ligne 9" draw:style-name="gr3" draw:text-style-name="P6" svg:x1="4.251cm" svg:y1="0.547cm" svg:x2="15.662cm" svg:y2="0.464cm"><text:p text:style-name="P6"/>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</text:span><text:span text:style-name="T6">n</text:span><text:span text:style-name="T6">d</text:span><text:span text:style-name="T6">_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/text:p></draw:line><draw:line text:anchor-type="paragraph" draw:z-index="18" draw:name="Ligne 10" draw:style-name="gr4" draw:text-style-name="P6" svg:x1="15.662cm" svg:y1="6.5cm" svg:x2="15.662cm" svg:y2="0.464cm"><text:p/></draw:line></text:p>
      <text:p text:style-name="P2"><draw:line text:anchor-type="paragraph" draw:z-index="12" draw:name="Ligne 5" draw:style-name="gr5" draw:text-style-name="P6" svg:x1="4.251cm" svg:y1="0.06cm" svg:x2="4.267cm" svg:y2="4.253cm"><text:p/></draw:line><draw:custom-shape text:anchor-type="paragraph" draw:z-index="2" draw:name="Forme 3" draw:style-name="gr6" draw:text-style-name="P8" svg:width="3.456cm" svg:height="2.497cm" svg:x="7.063cm" svg:y="0.252cm"><text:p text:style-name="P6">Registre 28 bits</text:p><text:p text:style-name="P6"><text:span text:style-name="T6">T</text:span><text:span text:style-name="T6">h</text:span><text:span text:style-name="T6">r</text:span><text:span text:style-name="T6">e</text:span><text:span text:style-name="T6">s</text:span><text:span text:style-name="T6">h</text:span><text:span text:style-name="T6">o</text:span><text:span text:style-name="T6">l</text:span><text:span text:style-name="T6">d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line text:anchor-type="paragraph" draw:z-index="8" draw:name="Ligne 3" draw:style-name="gr7" draw:text-style-name="P9" svg:x1="8.71cm" svg:y1="0.314cm" svg:x2="8.749cm" svg:y2="2.951cm"><text:p text:style-name="P6"><text:span text:style-name="T6"/></text:p><text:p text:style-name="P6"><text:span text:style-name="T6">T</text:span><text:span text:style-name="T6">h</text:span><text:span text:style-name="T6">r</text:span><text:span text:style-name="T6">e</text:span><text:span text:style-name="T6">s</text:span><text:span text:style-name="T6">h</text:span><text:span text:style-name="T6">o</text:span><text:span text:style-name="T6">l</text:span><text:span text:style-name="T6">d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/text:p></draw:line></text:p>
      <text:p text:style-name="P2"/>
      <text:p text:style-name="P2"/>
      <text:p text:style-name="P2"/>
      <text:p text:style-name="P2"/>
      <text:p text:style-name="P2"><draw:custom-shape text:anchor-type="paragraph" draw:z-index="1" draw:name="Forme 2" draw:style-name="gr8" draw:text-style-name="P8" svg:width="3.456cm" svg:height="3.456cm" svg:x="2.498cm" svg:y="-0.616cm"><text:p text:style-name="P6">Registre 28 bits</text:p><text:p text:style-name="P6"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/text:p><draw:enhanced-geometry svg:viewBox="0 0 21600 21600" draw:type="rectangle" draw:enhanced-path="M 0 0 L 21600 0 21600 21600 0 21600 0 0 Z N"/></draw:custom-shape><draw:custom-shape text:anchor-type="paragraph" draw:z-index="3" draw:name="Forme 4" draw:style-name="gr8" draw:text-style-name="P8" svg:width="3.456cm" svg:height="3.456cm" svg:x="11.68cm" svg:y="-0.616cm"><text:p text:style-name="P6">Registre 1 bit</text:p><text:p text:style-name="P6"><text:span text:style-name="T6">E</text:span><text:span text:style-name="T6">n</text:span><text:span text:style-name="T6">d</text:span><text:span text:style-name="T6">_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5" draw:name="Forme 6" draw:style-name="gr9" draw:text-style-name="P8" svg:width="1.158cm" svg:height="1.158cm" svg:x="8.193cm" svg:y="0.03cm"><text:p text:style-name="P6">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Ligne horizontale 3" draw:style-name="gr7" draw:text-style-name="P9" svg:x1="0.928cm" svg:y1="0.425cm" svg:x2="2.498cm" svg:y2="0.425cm"><text:p text:style-name="P6"><text:span text:style-name="T6">Reset</text:span><text:span text:style-name="T6">n <text:s text:c="7"/></text:span><text:span text:style-name="T6"><text:s text:c="10"/></text:span><text:span text:style-name="T6"><text:s text:c="10"/></text:span></text:p></draw:line></text:p>
      <text:p text:style-name="P2"><draw:line text:anchor-type="paragraph" draw:z-index="6" draw:name="Ligne 1" draw:style-name="gr7" draw:text-style-name="P9" svg:x1="5.953cm" svg:y1="0.171cm" svg:x2="8.193cm" svg:y2="0.12cm"><text:p text:style-name="P6"><text:span text:style-name="T6">Cou</text:span><text:span text:style-name="T6">nter</text:span></text:p><text:p text:style-name="P6"><text:span text:style-name="T6"/></text:p></draw:line><draw:line text:anchor-type="paragraph" draw:z-index="7" draw:name="Ligne 2" draw:style-name="gr5" draw:text-style-name="P6" svg:x1="9.35cm" svg:y1="0.187cm" svg:x2="11.68cm" svg:y2="0.153cm"><text:p/></draw:line><draw:line text:anchor-type="paragraph" draw:z-index="11" draw:name="Ligne horizontale 2" draw:style-name="gr7" draw:text-style-name="P9" svg:x1="15.136cm" svg:y1="0.171cm" svg:x2="16.327cm" svg:y2="0.171cm"><text:p text:style-name="P6"><text:span text:style-name="T6"><text:s text:c="32"/></text:span><text:span text:style-name="T6"><text:s text:c="4"/></text:span><text:span text:style-name="T7">end_counter_out</text:span></text:p></draw:line><draw:line text:anchor-type="paragraph" draw:z-index="14" draw:name="Ligne 6" draw:style-name="gr3" draw:text-style-name="P6" svg:x1="7.128cm" svg:y1="0.171cm" svg:x2="7.144cm" svg:y2="4.073cm"><svg:title>28</svg:title><text:p text:style-name="P6"/></draw:line></text:p>
      <text:p text:style-name="P2"/>
      <text:p text:style-name="P2"><draw:line text:anchor-type="paragraph" draw:z-index="10" draw:name="Ligne horizontale 1" draw:style-name="gr5" draw:text-style-name="P6" svg:x1="1.903cm" svg:y1="0.123cm" svg:x2="2.497cm" svg:y2="0.123cm"><text:p/></draw:line><draw:line text:anchor-type="paragraph" draw:z-index="16" draw:name="Ligne 8" draw:style-name="gr4" draw:text-style-name="P6" svg:x1="1.903cm" svg:y1="0.123cm" svg:x2="2.002cm" svg:y2="3cm"><text:p/></draw:line></text:p>
      <text:p text:style-name="P2"/>
      <text:p text:style-name="P2"><draw:line text:anchor-type="paragraph" draw:z-index="56" draw:name="Ligne 21" draw:style-name="gr1" draw:text-style-name="P6" svg:x1="6.959cm" svg:y1="0.413cm" svg:x2="7.299cm" svg:y2="0.136cm"><text:p text:style-name="P6"><text:s text:c="11"/>28</text:p></draw:line></text:p>
      <text:p text:style-name="P2"><draw:line text:anchor-type="paragraph" draw:z-index="57" draw:name="Ligne 22" draw:style-name="gr1" draw:text-style-name="P6" svg:x1="1.819cm" svg:y1="0.621cm" svg:x2="2.159cm" svg:y2="0.344cm"><text:p text:style-name="P6"><text:s/><text:s/><text:s/><text:s/><text:s/><text:s/><text:s/><text:s/><text:s/><text:s/><text:s/>28</text:p></draw:line></text:p>
      <text:p text:style-name="P2"><draw:custom-shape text:anchor-type="paragraph" draw:z-index="4" draw:name="Forme 5" draw:style-name="gr10" draw:text-style-name="P8" svg:width="1.391cm" svg:height="1.391cm" svg:x="3.522cm" svg:y="0.358cm"><text:p text:style-name="P6">Adder</text:p><text:p text:style-name="P6">+1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9" draw:name="Ligne 4" draw:style-name="gr5" draw:text-style-name="P6" svg:x1="7.062cm" svg:y1="0.146cm" svg:x2="4.912cm" svg:y2="0.162cm"><text:p/></draw:line><draw:line text:anchor-type="paragraph" draw:z-index="15" draw:name="Ligne 7" draw:style-name="gr4" draw:text-style-name="P6" svg:x1="3.522cm" svg:y1="0.062cm" svg:x2="2.002cm" svg:y2="0.08cm"><text:p/></draw:line></text:p>
      <text:p text:style-name="P2"/>
      <text:p text:style-name="P2"/>
      <text:p text:style-name="P2"/>
      <text:p text:style-name="P2"/>
      <text:p text:style-name="P2">4)</text:p>
      <text:p text:style-name="P10">Les signaux d’entré<text:span text:style-name="T8">e</text:span> sont : Clk, <text:span text:style-name="T9">resetn</text:span></text:p>
      <text:p text:style-name="P10">Les signaux internes sont : Counter, End_counter, Threshold</text:p>
      <text:p text:style-name="P10">Les signaux de sortie sont : End_counter</text:p>
      <text:p text:style-name="P10"/>
      <text:p text:style-name="P11">7)</text:p>
      <text:p text:style-name="P11">O<text:span text:style-name="T10">n </text:span>vérifie d’abord que le compteur compte bien et que sa valeur s’incrémente correctement. Ensuite on vérifie que le compteur s’arrête et redémarre au bon moment.</text:p>
      <text:p text:style-name="P11"/>
      <text:p text:style-name="P12">8) </text:p>
      <text:p text:style-name="P12">Pour utiliser une LED j’ai décommenté cette ligne dans le fichier de contrainte :</text:p>
      <text:p text:style-name="P13">set_property -dict { PACKAGE_PIN L15 <text:s text:c="2"/>IOSTANDARD LVCMOS33 } [get_ports { led0_b }];</text:p>
      <text:p text:style-name="P14"><text:soft-page-break/>Dans le fichier <text:span text:style-name="T6">counter.vhd, </text:span>j’ajoute une sortie nommée <text:span text:style-name="T6">led0_b </text:span>que je connecte à <text:span text:style-name="T6">end_counter.</text:span></text:p>
      <text:p text:style-name="P14">La LED est censée s’allumer lorsque <text:span text:style-name="T6">end_counter</text:span> est à 1 c’est-à-dire pendant un seul coup d’horloge toutes les 2 secondes. Je n’ai pas la carte pour vérifier.</text:p>
      <text:p text:style-name="Text_20_body"/>
      <text:p text:style-name="P15">9)</text:p>
      <text:p text:style-name="P16"><draw:custom-shape text:anchor-type="paragraph" draw:z-index="19" draw:name="Forme 7" draw:style-name="gr11" draw:text-style-name="P7" svg:width="15.4cm" svg:height="11.96cm" svg:x="0.928cm" svg:y="0.605cm"><text:p/><draw:enhanced-geometry svg:viewBox="0 0 21600 21600" draw:type="rectangle" draw:enhanced-path="M 0 0 L 21600 0 21600 21600 0 21600 0 0 Z N"/></draw:custom-shape></text:p>
      <text:p text:style-name="P16"/>
      <text:p text:style-name="P16"><draw:line text:anchor-type="paragraph" draw:z-index="31" draw:name="Ligne 15" draw:style-name="gr5" draw:text-style-name="P6" svg:x1="4.251cm" svg:y1="0.06cm" svg:x2="4.267cm" svg:y2="4.253cm"><text:p/></draw:line><draw:line text:anchor-type="paragraph" draw:z-index="37" draw:name="Ligne 20" draw:style-name="gr4" draw:text-style-name="P6" svg:x1="14.566cm" svg:y1="5.99cm" svg:x2="14.566cm" svg:y2="0.06cm"><text:p/></draw:line><draw:line text:anchor-type="paragraph" draw:z-index="36" draw:name="Ligne 19" draw:style-name="gr3" draw:text-style-name="P6" svg:x1="4.251cm" svg:y1="0.06cm" svg:x2="14.584cm" svg:y2="0.06cm"><text:p text:style-name="P6"/>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d_Counter</text:span></text:p></draw:line><draw:custom-shape text:anchor-type="paragraph" draw:z-index="21" draw:name="Forme 9" draw:style-name="gr12" draw:text-style-name="P8" svg:width="3.456cm" svg:height="2.433cm" svg:x="7.063cm" svg:y="0.252cm"><text:p text:style-name="P6">Registre 28 bits</text:p><text:p text:style-name="P6"><text:span text:style-name="T6">Threshold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><draw:line text:anchor-type="paragraph" draw:z-index="27" draw:name="Ligne 13" draw:style-name="gr7" draw:text-style-name="P9" svg:x1="8.738cm" svg:y1="0.25cm" svg:x2="8.749cm" svg:y2="2.951cm"><text:p text:style-name="P6"><text:span text:style-name="T6"/></text:p><text:p text:style-name="P6"><text:span text:style-name="T6">Threshold <text:s text:c="5"/></text:span></text:p></draw:line></text:p>
      <text:p text:style-name="P16"/>
      <text:p text:style-name="P16"/>
      <text:p text:style-name="P16"/>
      <text:p text:style-name="P16"><draw:line text:anchor-type="paragraph" draw:z-index="45" draw:name="Ligne horizontale 14" draw:style-name="gr7" draw:text-style-name="P18" svg:x1="0.928cm" svg:y1="0.416cm" svg:x2="2.498cm" svg:y2="0.416cm"><text:p text:style-name="P17"><text:span text:style-name="T6">Restart <text:s text:c="28"/></text:span></text:p></draw:line><draw:line text:anchor-type="paragraph" draw:z-index="61" draw:name="Ligne 26" draw:style-name="gr1" draw:text-style-name="P6" svg:x1="8.629cm" svg:y1="0.52cm" svg:x2="8.969cm" svg:y2="0.243cm"><text:p text:style-name="P6"><text:s text:c="11"/>28</text:p></draw:line></text:p>
      <text:p text:style-name="P16"><draw:custom-shape text:anchor-type="paragraph" draw:z-index="20" draw:name="Forme 8" draw:style-name="gr8" draw:text-style-name="P8" svg:width="3.456cm" svg:height="3.456cm" svg:x="2.498cm" svg:y="-0.616cm"><text:p text:style-name="P6">Registre 28 bits</text:p><text:p text:style-name="P6"><text:span text:style-name="T6">Counter</text:span></text:p><draw:enhanced-geometry svg:viewBox="0 0 21600 21600" draw:type="rectangle" draw:enhanced-path="M 0 0 L 21600 0 21600 21600 0 21600 0 0 Z N"/></draw:custom-shape><draw:custom-shape text:anchor-type="paragraph" draw:z-index="22" draw:name="Forme 10" draw:style-name="gr8" draw:text-style-name="P8" svg:width="3.456cm" svg:height="3.456cm" svg:x="10.68cm" svg:y="-0.616cm"><text:p text:style-name="P6">Registre 1 bit</text:p><text:p text:style-name="P6"><text:span text:style-name="T6">End_counter</text:span></text:p><draw:enhanced-geometry svg:viewBox="0 0 21600 21600" draw:type="rectangle" draw:enhanced-path="M 0 0 L 21600 0 21600 21600 0 21600 0 0 Z N"/></draw:custom-shape></text:p>
      <text:p text:style-name="P16"><draw:custom-shape text:anchor-type="paragraph" draw:z-index="24" draw:name="Forme 12" draw:style-name="gr13" draw:text-style-name="P8" svg:width="1.158cm" svg:height="1.158cm" svg:x="8.193cm" svg:y="0.03cm"><text:p text:style-name="P6">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Ligne horizontale 6" draw:style-name="gr7" draw:text-style-name="P9" svg:x1="0.928cm" svg:y1="0.425cm" svg:x2="2.498cm" svg:y2="0.425cm"><text:p text:style-name="P6"><text:span text:style-name="T6">Resetn <text:s text:c="27"/></text:span></text:p></draw:line></text:p>
      <text:p text:style-name="P16"><draw:line text:anchor-type="paragraph" draw:z-index="25" draw:name="Ligne 11" draw:style-name="gr7" draw:text-style-name="P9" svg:x1="5.953cm" svg:y1="0.171cm" svg:x2="8.193cm" svg:y2="0.12cm"><text:p text:style-name="P6"><text:span text:style-name="T6">Counter</text:span></text:p><text:p text:style-name="P6"><text:span text:style-name="T6"/></text:p></draw:line><draw:line text:anchor-type="paragraph" draw:z-index="30" draw:name="Ligne horizontale 5" draw:style-name="gr5" draw:text-style-name="P6" svg:x1="14.136cm" svg:y1="0.148cm" svg:x2="16.327cm" svg:y2="0.171cm"><text:p/></draw:line><draw:line text:anchor-type="paragraph" draw:z-index="33" draw:name="Ligne 16" draw:style-name="gr4" draw:text-style-name="P6" svg:x1="7.128cm" svg:y1="0.171cm" svg:x2="7.144cm" svg:y2="4.073cm"><text:p/></draw:line><draw:line text:anchor-type="paragraph" draw:z-index="26" draw:name="Ligne 12" draw:style-name="gr5" draw:text-style-name="P6" svg:x1="9.35cm" svg:y1="0.187cm" svg:x2="10.786cm" svg:y2="0.187cm"><text:p/></draw:line><draw:line text:anchor-type="paragraph" draw:z-index="39" draw:name="Ligne horizontale 7" draw:style-name="gr5" draw:text-style-name="P6" svg:x1="14.136cm" svg:y1="0.148cm" svg:x2="16.327cm" svg:y2="0.171cm"><text:p/></draw:line><draw:line text:anchor-type="paragraph" draw:z-index="40" draw:name="Ligne horizontale 8" draw:style-name="gr5" draw:text-style-name="P6" svg:x1="14.603cm" svg:y1="0.171cm" svg:x2="14.622cm" svg:y2="2.693cm"><text:p/></draw:line><draw:line text:anchor-type="paragraph" draw:z-index="41" draw:name="Ligne horizontale 9" draw:style-name="gr5" draw:text-style-name="P6" svg:x1="14.136cm" svg:y1="0.148cm" svg:x2="16.327cm" svg:y2="0.171cm"><text:p/></draw:line><draw:line text:anchor-type="paragraph" draw:z-index="42" draw:name="Ligne horizontale 10" draw:style-name="gr5" draw:text-style-name="P6" svg:x1="14.136cm" svg:y1="0.148cm" svg:x2="16.327cm" svg:y2="0.171cm"><text:p/></draw:line><draw:line text:anchor-type="paragraph" draw:z-index="43" draw:name="Ligne horizontale 11" draw:style-name="gr7" draw:text-style-name="P9" svg:x1="14.136cm" svg:y1="0.148cm" svg:x2="16.327cm" svg:y2="0.171cm"><text:p text:style-name="P6"><text:span text:style-name="T6"><text:s text:c="45"/></text:span><text:span text:style-name="T7">end_counter_out</text:span></text:p></draw:line></text:p>
      <text:p text:style-name="P16"/>
      <text:p text:style-name="P16"><draw:line text:anchor-type="paragraph" draw:z-index="29" draw:name="Ligne horizontale 4" draw:style-name="gr5" draw:text-style-name="P6" svg:x1="1.903cm" svg:y1="0.123cm" svg:x2="2.497cm" svg:y2="0.123cm"><text:p/></draw:line><draw:line text:anchor-type="paragraph" draw:z-index="35" draw:name="Ligne 18" draw:style-name="gr4" draw:text-style-name="P6" svg:x1="1.903cm" svg:y1="0.123cm" svg:x2="2.002cm" svg:y2="3cm"><text:p/></draw:line></text:p>
      <text:p text:style-name="P16"/>
      <text:p text:style-name="P16"><draw:line text:anchor-type="paragraph" draw:z-index="59" draw:name="Ligne 24" draw:style-name="gr1" draw:text-style-name="P6" svg:x1="6.959cm" svg:y1="0.413cm" svg:x2="7.299cm" svg:y2="0.136cm"><text:p text:style-name="P6"><text:s text:c="11"/>28</text:p></draw:line></text:p>
      <text:p text:style-name="P16"><draw:custom-shape text:anchor-type="paragraph" draw:z-index="38" draw:name="Forme 13" draw:style-name="gr14" draw:text-style-name="P8" svg:width="2.585cm" svg:height="2.043cm" svg:x="12.298cm" svg:y="0.259cm"><text:p text:style-name="P6">Registre 1 bit</text:p><text:p text:style-name="P6"><text:span text:style-name="T6">led</text:span></text:p><draw:enhanced-geometry svg:viewBox="0 0 21600 21600" draw:type="rectangle" draw:enhanced-path="M 0 0 L 21600 0 21600 21600 0 21600 0 0 Z N"/></draw:custom-shape><draw:line text:anchor-type="paragraph" draw:z-index="60" draw:name="Ligne 25" draw:style-name="gr1" draw:text-style-name="P6" svg:x1="1.799cm" svg:y1="0.572cm" svg:x2="2.139cm" svg:y2="0.295cm"><text:p text:style-name="P6"><text:s/><text:s/><text:s/><text:s/><text:s/><text:s/><text:s/><text:s/><text:s/><text:s/><text:s/>28</text:p></draw:line></text:p>
      <text:p text:style-name="P16"><draw:custom-shape text:anchor-type="paragraph" draw:z-index="23" draw:name="Forme 11" draw:style-name="gr15" draw:text-style-name="P8" svg:width="1.391cm" svg:height="1.391cm" svg:x="3.522cm" svg:y="0.358cm"><text:p text:style-name="P6">Adder</text:p><text:p text:style-name="P6">+1</text:p><draw:enhanced-geometry svg:viewBox="0 0 21600 21600" draw:type="rectangle" draw:enhanced-path="M 0 0 L 21600 0 21600 21600 0 21600 0 0 Z N"/></draw:custom-shape></text:p>
      <text:p text:style-name="P16"><draw:line text:anchor-type="paragraph" draw:z-index="44" draw:name="Ligne horizontale 12" draw:style-name="gr7" draw:text-style-name="P9" svg:x1="14.882cm" svg:y1="0.213cm" svg:x2="16.418cm" svg:y2="0.218cm"><text:p text:style-name="P6"><text:span text:style-name="T6"><text:s text:c="26"/>led0_b</text:span></text:p></draw:line></text:p>
      <text:p text:style-name="P16"><draw:line text:anchor-type="paragraph" draw:z-index="28" draw:name="Ligne 14" draw:style-name="gr5" draw:text-style-name="P6" svg:x1="7.062cm" svg:y1="0.146cm" svg:x2="4.912cm" svg:y2="0.162cm"><text:p/></draw:line><draw:line text:anchor-type="paragraph" draw:z-index="34" draw:name="Ligne 17" draw:style-name="gr4" draw:text-style-name="P6" svg:x1="3.522cm" svg:y1="0.062cm" svg:x2="2.002cm" svg:y2="0.08cm"><text:p/></draw:line></text:p>
      <text:p text:style-name="P16"/>
      <text:p text:style-name="P16"/>
      <text:p text:style-name="P16"/>
      <text:p text:style-name="P16"/>
      <text:p text:style-name="P19">11)</text:p>
      <text:p text:style-name="P19">Pour ass<text:span text:style-name="T11">o</text:span>cier un bouton <text:span text:style-name="T12">au signal </text:span><text:span text:style-name="T6">restart</text:span><text:span text:style-name="T12">, </text:span><text:span text:style-name="T6"><text:s/></text:span><text:span text:style-name="T12">on décommente la ligne suivante dans le fichier de contrainte. Je reno</text:span><text:span text:style-name="T13">m</text:span><text:span text:style-name="T12">me le bouton en </text:span><text:span text:style-name="T6">restart.</text:span></text:p>
      <text:p text:style-name="P20"><text:span text:style-name="T6">set_property -dict { PACKAGE_PIN D20 <text:s text:c="2"/>IOSTANDARD LVCMOS33 } [get_ports { restart }];</text:span></text:p>
      <text:p text:style-name="P21">Après synthèse, on peut vérifier que Vivado a bien associer la LED et le bouton à nos signaux.</text:p>
      <text:p text:style-name="P21"><draw:frame draw:style-name="fr1" draw:name="Image1" text:anchor-type="char" svg:x="0.155cm" svg:y="0.037cm" svg:width="17cm" svg:height="3.226cm" draw:z-index="47"><draw:image xlink:href="Pictures/1000000100000350000000A10994765E.png" xlink:type="simple" xlink:show="embed" xlink:actuate="onLoad" draw:mime-type="image/png"/></draw:frame></text:p>
      <text:p text:style-name="P22"/>
      <text:p text:style-name="P23">12) </text:p>
      <text:p text:style-name="P22">On vérifie surtout le signal <text:span text:style-name="T6">led. </text:span><text:span text:style-name="T12">Celui-ci doit changer d’état à chaque fois que le compteur se termine, c’est-à-dire quand </text:span><text:span text:style-name="T6">end_counter</text:span><text:span text:style-name="T12"> est levé.</text:span></text:p>
      <text:p text:style-name="P24">Les signal <text:span text:style-name="T6">led</text:span> doit aussi se remettre à 0 correctement lorsque <text:span text:style-name="T6">restart</text:span> ou <text:span text:style-name="T6">resetn</text:span> sont à 1.</text:p>
      <text:p text:style-name="P25"><draw:frame draw:style-name="fr2" draw:name="Image2" text:anchor-type="char" svg:width="17cm" svg:height="3.655cm" draw:z-index="48"><draw:image xlink:href="Pictures/10000001000005FF0000014A6B2327E8.png" xlink:type="simple" xlink:show="embed" xlink:actuate="onLoad" draw:mime-type="image/png"/></draw:frame>En vert les signaux du testbench et en rouge les signaux internes au compteur.</text:p>
      <text:p text:style-name="P26"/>
      <text:p text:style-name="P26">13)</text:p>
      <text:p text:style-name="P27"><draw:frame draw:style-name="fr3" draw:name="Image3" text:anchor-type="char" svg:x="-0.713cm" svg:y="0.462cm" svg:width="17.944cm" svg:height="11.972cm" draw:z-index="49"><draw:image xlink:href="Pictures/1000000100000613000002A2CB6AE680.png" xlink:type="simple" xlink:show="embed" xlink:actuate="onLoad" draw:mime-type="image/png"/></draw:frame></text:p>
      <text:p text:style-name="P11">En bleu les 28 LUT de <text:span text:style-name="T6">counter</text:span> et en rouge les 28 registres de <text:span text:style-name="T6">counter</text:span>.</text:p>
      <text:p text:style-name="P11">En ro<text:span text:style-name="T11">s</text:span>e les <text:span text:style-name="T14">7</text:span><text:span text:style-name="T15"> </text:span>registres de <text:span text:style-name="T15">c</text:span>arry pour l’addition. Chacune de ces cellules gèrent 4 bits de retenue.</text:p>
      <text:p text:style-name="P11">En marron claire à droite, les <text:span text:style-name="T15">4 </text:span>LUT et le registre de <text:span text:style-name="T6">end_counter</text:span>.</text:p>
      <text:p text:style-name="P11">En bleu claire à droite, la LUT et le registre de la LED.</text:p>
      <text:p text:style-name="P11"/>
      <text:p text:style-name="P28">Le schematic semble cohérent avec notre structure.</text:p>
      <text:p text:style-name="P29"><text:soft-page-break/>14)</text:p>
      <text:p text:style-name="P11">On s’attend à avoir en tout 33 LUT, 30 registres et 4 registre de carry.</text:p>
      <text:p text:style-name="P11">Dans les slices, on trouve des LUT6. Peut être que l’outil va pouvoir mettre 2 LUT3 dans une seule LUT6. On s’attend donc à avoir 2 fois moins de slice, c’est-à-dire environ 17 slices.</text:p>
      <text:p text:style-name="P11"/>
      <text:p text:style-name="P11"><draw:frame draw:style-name="fr1" draw:name="Image5" text:anchor-type="char" svg:x="0.199cm" svg:y="0.102cm" svg:width="9.888cm" svg:height="5.009cm" draw:z-index="51"><draw:image xlink:href="Pictures/10000001000001C4000000E5A2020FC9.png" xlink:type="simple" xlink:show="embed" xlink:actuate="onLoad" draw:mime-type="image/png"/></draw:frame><draw:frame draw:style-name="fr4" draw:name="Image4" text:anchor-type="char" svg:x="10.507cm" svg:y="0.252cm" svg:width="6.167cm" svg:height="4.801cm" draw:z-index="50"><draw:image xlink:href="Pictures/1000000100000139000000EB31369F5C.png" xlink:type="simple" xlink:show="embed" xlink:actuate="onLoad" draw:mime-type="image/png"/></draw:frame></text:p>
      <text:p text:style-name="P11"/>
      <text:p text:style-name="P11"/>
      <text:p text:style-name="P11"/>
      <text:p text:style-name="P30"/>
      <text:p text:style-name="P30"/>
      <text:p text:style-name="Text_20_body"/>
      <text:p text:style-name="Text_20_body"/>
      <text:p text:style-name="P11">Le rapport montre finalement une utilisation de 22 Slice LUT et 29 Slice Registers.</text:p>
      <text:p text:style-name="P11">L’outil utilise 36 LUT de tailles différentes. On retrouve tout de même les 28 LUT3 du compteur.</text:p>
      <text:p text:style-name="P11">Dans les 29 registres FDCE sont inclus les 28 registres du compteur. Le 29ème étant peut-être alloué à <text:span text:style-name="T6">end_counter</text:span> et <text:span text:style-name="T6">led</text:span>.</text:p>
      <text:p text:style-name="P11">On retrouve également les 7 CARRY4 <text:s/>pour les retenues de l’incrémentation.</text:p>
      <text:p text:style-name="P11">Les 3 buffers d’entrées correspondent à nos signaux d’entrées (<text:span text:style-name="T6">clk, resetn</text:span> et <text:span text:style-name="T6">restart</text:span>). Les buffers de sorties correspondent bien à nos signaux de sorties (<text:span text:style-name="T6">end_counter_out</text:span> et <text:span text:style-name="T6">l</text:span><text:span text:style-name="T6">ed0_b</text:span>).</text:p>
      <text:p text:style-name="P11">On remarque que notre signal d’horloge a un buffer supplémentaire dédié aux horloges.</text:p>
      <text:p text:style-name="P31"/>
      <text:p text:style-name="P32">15)</text:p>
      <text:p text:style-name="P33">On place une sondes sur les 5 signaux : <text:span text:style-name="T6">restart, resetn, clk, en_counter_out</text:span> et <text:span text:style-name="T6">led0_b.</text:span></text:p>
      <text:p text:style-name="P34"><draw:frame draw:style-name="fr1" draw:name="Image6" text:anchor-type="char" svg:x="4.392cm" svg:y="-0.093cm" svg:width="7.955cm" svg:height="5.516cm" draw:z-index="52"><draw:image xlink:href="Pictures/10000001000003530000024EB804631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>16)</text:p>
      <text:p text:style-name="P11">Pour assigner l’horloge, on décommente ces 2 lignes dans le fichier de contrainte. <text:span text:style-name="T16">On règle aussi sa période sur 10ns.</text:span></text:p>
      <text:p text:style-name="P11"/>
      <text:p text:style-name="P36">set_property -dict { PACKAGE_PIN H16 <text:s text:c="2"/>IOSTANDARD LVCMOS33 } [get_ports { clk }];</text:p>
      <text:p text:style-name="P36">create_clock -add -name sys_clk_pin -period 10.00 -waveform {0 4} [get_ports { clk }];</text:p>
      <text:p text:style-name="P37"/>
      <text:p text:style-name="P38">Après implémentation, on peut vérifier la fréquence de l’horloge.</text:p>
      <text:p text:style-name="P37"/>
      <text:p text:style-name="P37"><draw:frame draw:style-name="fr2" draw:name="Image7" text:anchor-type="char" svg:width="8.502cm" svg:height="1.254cm" draw:z-index="53"><draw:image xlink:href="Pictures/100000010000017C000000388C5FC9CA.png" xlink:type="simple" xlink:show="embed" xlink:actuate="onLoad" draw:mime-type="image/png"/></draw:frame></text:p>
      <text:p text:style-name="P11"><text:soft-page-break/></text:p>
      <text:p text:style-name="P11">Le Total Negative Slack et le Total Hold Slack sont bien à 0ns.</text:p>
      <text:p text:style-name="P39">Le Worst Negative Slack nous renseigne sur le chemin critique. </text:p>
      <text:p text:style-name="P39"><draw:frame draw:style-name="fr1" draw:name="Image8" text:anchor-type="char" svg:x="0cm" svg:y="0.339cm" svg:width="17cm" svg:height="4.336cm" draw:z-index="54"><draw:image xlink:href="Pictures/100000010000036E000000E03FD3FDC5.png" xlink:type="simple" xlink:show="embed" xlink:actuate="onLoad" draw:mime-type="image/png"/></draw:frame></text:p>
      <text:p text:style-name="P39">Le chemin critique a un délai total de 3,981ns qui est inférieure à 10ns la période de l’horloge.</text:p>
      <text:p text:style-name="P39"/>
      <text:p text:style-name="P39"><draw:frame draw:style-name="fr5" draw:name="Image9" text:anchor-type="char" svg:width="17cm" svg:height="1.132cm" draw:z-index="55"><draw:image xlink:href="Pictures/100000010000035700000039ADEAC0C0.png" xlink:type="simple" xlink:show="embed" xlink:actuate="onLoad" draw:mime-type="image/png"/></draw:frame></text:p>
      <text:p text:style-name="P40">Le chemin critique se situe entre 2 registres du compteur. On peut remarquer que le délai de trajet n’est pas négligeable devant le délai logique.</text:p>
      <text:p text:style-name="P40">Il est possible de visualiser le chemin critique sur le schematic.</text:p>
      <text:p text:style-name="P39"/>
      <text:p text:style-name="P39"/>
      <text:p text:style-name="P39"><draw:frame draw:style-name="fr5" draw:name="Image10" text:anchor-type="char" svg:width="17cm" svg:height="7.234cm" draw:z-index="56"><draw:image xlink:href="Pictures/10000001000005F5000002896574AADB.png" xlink:type="simple" xlink:show="embed" xlink:actuate="onLoad" draw:mime-type="image/png"/></draw:frame></text:p>
      <text:p text:style-name="P39"/>
      <text:p text:style-name="P41">17)</text:p>
      <text:p text:style-name="P41">Avant de générer le bitstream, il faut assigner toutes les entrées et sorties de l’architecture.</text:p>
      <text:p text:style-name="P41">Il ne nous manque plus que <text:span text:style-name="T6">end_counter_out </text:span><text:span text:style-name="T12">et </text:span><text:span text:style-name="T6">resetn</text:span><text:span text:style-name="T12"> à connecter. On va donc décommenter dans le fichier de contrainte 2 lignes pour des I/O standards.</text:span></text:p>
      <text:p text:style-name="P42"/>
      <text:p text:style-name="P36">set_property -dict { PACKAGE_PIN L19 <text:s text:c="2"/>IOSTANDARD LVCMOS33 }<text:span text:style-name="T17">[</text:span>get_ports{ end_counter_out }];</text:p>
      <text:p text:style-name="P36">set_property -dict { PACKAGE_PIN M19 <text:s text:c="2"/>IOSTANDARD LVCMOS33 } [get_ports { resetn }];</text:p>
      <text:p text:style-name="P36"/>
      <text:p text:style-name="P36"/>
      <text:p text:style-name="P43">Le bitstream est correctement généré. Je n’ai malheureusement pas encore la carte pour y tester l’architec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13:13:04.837171564</meta:creation-date>
    <dc:date>2026-07-06T16:08:17.022851853</dc:date>
    <meta:editing-duration>PT10H46M37S</meta:editing-duration>
    <meta:editing-cycles>36</meta:editing-cycles>
    <meta:generator>LibreOffice/26.2.4.2$Linux_X86_64 LibreOffice_project/3346a99e6b841765b75a9b29714a5b95c6761ce3</meta:generator>
    <meta:document-statistic meta:table-count="0" meta:image-count="10" meta:object-count="0" meta:page-count="5" meta:paragraph-count="60" meta:word-count="724" meta:character-count="4331" meta:non-whitespace-character-count="3649"/>
  </office:meta>
</office:document-meta>
</file>