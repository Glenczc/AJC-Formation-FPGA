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B000000D3128ED1AD.png" manifest:media-type="image/png"/>
  <manifest:file-entry manifest:full-path="Pictures/100000010000053C0000026640E71EE6.png" manifest:media-type="image/png"/>
  <manifest:file-entry manifest:full-path="Pictures/10000001000002C000000158C0699ABA.png" manifest:media-type="image/png"/>
  <manifest:file-entry manifest:full-path="Pictures/10000001000001BC000000E668BAA1CB.png" manifest:media-type="image/png"/>
  <manifest:file-entry manifest:full-path="Pictures/10000001000003FE00000033D5B18EB6.png" manifest:media-type="image/png"/>
  <manifest:file-entry manifest:full-path="Pictures/1000000100000133000000FA99F81906.png" manifest:media-type="image/png"/>
  <manifest:file-entry manifest:full-path="Pictures/1000000100000602000000DCAEBA6ECC.png" manifest:media-type="image/png"/>
  <manifest:file-entry manifest:full-path="Pictures/100000010000060200000163841217A2.png" manifest:media-type="image/png"/>
  <manifest:file-entry manifest:full-path="Pictures/1000000100000604000000EFC9053C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492f" officeooo:paragraph-rsid="0011492f" style:font-weight-asian="bold" style:font-weight-complex="bold"/>
    </style:style>
    <style:style style:name="P2" style:family="paragraph" style:parent-style-name="Standard">
      <style:paragraph-properties fo:text-align="left" style:justify-single-word="false"/>
      <style:text-properties fo:font-weight="normal" officeooo:rsid="0011492f" officeooo:paragraph-rsid="0011492f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left" style:justify-single-word="false"/>
      <style:text-properties fo:font-weight="normal" officeooo:rsid="001882b6" officeooo:paragraph-rsid="001882b6" style:font-weight-asian="normal" style:font-weight-complex="normal"/>
    </style:style>
    <style:style style:name="P8" style:family="paragraph" style:parent-style-name="Standard">
      <style:paragraph-properties fo:text-align="left" style:justify-single-word="false"/>
      <style:text-properties fo:font-style="italic" fo:font-weight="normal" officeooo:rsid="001882b6" officeooo:paragraph-rsid="001882b6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left" style:justify-single-word="false"/>
      <style:text-properties fo:font-style="normal" fo:font-weight="normal" officeooo:rsid="001882b6" officeooo:paragraph-rsid="001882b6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left" style:justify-single-word="false"/>
      <style:text-properties fo:font-weight="normal" officeooo:rsid="00156a81" officeooo:paragraph-rsid="00156a81" style:font-weight-asian="normal" style:font-weight-complex="normal"/>
    </style:style>
    <style:style style:name="P11" style:family="paragraph" style:parent-style-name="Standard">
      <style:paragraph-properties fo:text-align="left" style:justify-single-word="false" fo:break-before="page"/>
      <style:text-properties fo:font-weight="normal" officeooo:rsid="00156a81" officeooo:paragraph-rsid="00156a81" style:font-weight-asian="normal" style:font-weight-complex="normal"/>
    </style:style>
    <style:style style:name="P12" style:family="paragraph" style:parent-style-name="Standard">
      <style:paragraph-properties fo:text-align="left" style:justify-single-word="false"/>
      <style:text-properties fo:font-weight="normal" officeooo:rsid="001bc2f4" officeooo:paragraph-rsid="001bc2f4" style:font-weight-asian="normal" style:font-weight-complex="normal"/>
    </style:style>
    <style:style style:name="P13" style:family="paragraph" style:parent-style-name="Standard">
      <style:paragraph-properties fo:text-align="left" style:justify-single-word="false"/>
      <style:text-properties fo:font-style="italic" fo:font-weight="normal" officeooo:rsid="001df099" officeooo:paragraph-rsid="001bc2f4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left" style:justify-single-word="false"/>
      <style:text-properties fo:font-style="normal" fo:font-weight="normal" officeooo:rsid="001df099" officeooo:paragraph-rsid="001df09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left" style:justify-single-word="false"/>
      <style:text-properties fo:font-style="italic" fo:font-weight="normal" officeooo:rsid="001fa692" officeooo:paragraph-rsid="001fa692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left" style:justify-single-word="false"/>
      <style:text-properties fo:font-style="normal" fo:font-weight="normal" officeooo:rsid="0024fc01" officeooo:paragraph-rsid="0024fc0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left" style:justify-single-word="false"/>
      <style:text-properties fo:font-style="normal" fo:font-weight="normal" officeooo:rsid="001fa692" officeooo:paragraph-rsid="001fa69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left" style:justify-single-word="false"/>
      <style:text-properties fo:font-style="normal" fo:font-weight="normal" officeooo:rsid="0029319e" officeooo:paragraph-rsid="0029319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left" style:justify-single-word="false"/>
      <style:text-properties fo:font-style="italic" fo:font-weight="normal" officeooo:rsid="001cf21d" officeooo:paragraph-rsid="001bc2f4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left" style:justify-single-word="false"/>
      <style:text-properties fo:font-style="normal" fo:font-weight="normal" officeooo:rsid="002588ff" officeooo:paragraph-rsid="002588f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left" style:justify-single-word="false"/>
      <style:text-properties fo:font-style="normal" fo:font-weight="normal" officeooo:rsid="00293d40" officeooo:paragraph-rsid="00293d4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left" style:justify-single-word="false" fo:break-before="page"/>
      <style:text-properties fo:font-style="italic" fo:font-weight="normal" officeooo:rsid="00293d40" officeooo:paragraph-rsid="00293d40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left" style:justify-single-word="false"/>
      <style:text-properties fo:font-style="italic" fo:font-weight="normal" officeooo:rsid="00293d40" officeooo:paragraph-rsid="00293d40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left" style:justify-single-word="false"/>
      <style:text-properties fo:font-style="normal" fo:font-weight="normal" officeooo:rsid="0030a2be" officeooo:paragraph-rsid="002588f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left" style:justify-single-word="false"/>
      <style:text-properties fo:font-style="normal" fo:font-weight="normal" officeooo:rsid="0030a2be" officeooo:paragraph-rsid="0030a2b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left" style:justify-single-word="false"/>
      <style:text-properties fo:font-style="normal" fo:font-weight="normal" officeooo:rsid="00325e5c" officeooo:paragraph-rsid="00325e5c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left" style:justify-single-word="false"/>
      <style:text-properties fo:font-style="normal" fo:font-weight="normal" officeooo:rsid="0033764f" officeooo:paragraph-rsid="0033764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left" style:justify-single-word="false"/>
      <style:text-properties fo:font-style="normal" fo:font-weight="normal" officeooo:rsid="00353684" officeooo:paragraph-rsid="0035368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left" style:justify-single-word="false"/>
      <style:text-properties fo:font-style="normal" fo:font-weight="normal" officeooo:rsid="003877d9" officeooo:paragraph-rsid="003877d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left" style:justify-single-word="false"/>
      <style:text-properties fo:font-style="normal" fo:font-weight="normal" officeooo:rsid="00362048" officeooo:paragraph-rsid="00362048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cm" fo:margin-bottom="0.499cm" style:contextual-spacing="false" fo:text-align="left" style:justify-single-word="false"/>
      <style:text-properties fo:font-style="normal" fo:font-weight="normal" officeooo:rsid="002bda35" officeooo:paragraph-rsid="002bda35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size="11pt" fo:font-style="italic" fo:font-weight="normal" officeooo:rsid="0024fc01" officeooo:paragraph-rsid="0024fc01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size="11pt" fo:font-style="italic" fo:font-weight="normal" officeooo:rsid="0024fc01" officeooo:paragraph-rsid="002588ff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left" style:justify-single-word="false"/>
      <style:text-properties fo:font-size="11pt" fo:font-style="italic" officeooo:paragraph-rsid="0024fc01" style:font-size-asian="11pt" style:font-style-asian="italic" style:font-size-complex="11pt" style:font-style-complex="italic"/>
    </style:style>
    <style:style style:name="P35" style:family="paragraph" style:parent-style-name="Text_20_body">
      <style:text-properties officeooo:rsid="002c011b" officeooo:paragraph-rsid="002c011b"/>
    </style:style>
    <style:style style:name="P36" style:family="paragraph" style:parent-style-name="Standard">
      <style:paragraph-properties fo:text-align="left" style:justify-single-word="false"/>
      <style:text-properties fo:font-style="normal" fo:font-weight="normal" officeooo:rsid="002d0ea9" officeooo:paragraph-rsid="002d0ea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left" style:justify-single-word="false"/>
      <style:text-properties fo:font-style="normal" fo:font-weight="normal" officeooo:rsid="002dbfc4" officeooo:paragraph-rsid="002dbfc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left" style:justify-single-word="false"/>
      <style:text-properties fo:font-style="italic" fo:font-weight="normal" officeooo:rsid="002dbfc4" officeooo:paragraph-rsid="002dbfc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left" style:justify-single-word="false"/>
      <style:text-properties fo:font-style="normal" fo:font-weight="normal" officeooo:rsid="002ec606" officeooo:paragraph-rsid="002ec606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officeooo:rsid="001cf21d" style:font-style-asian="italic" style:font-style-complex="italic"/>
    </style:style>
    <style:style style:name="T4" style:family="text">
      <style:text-properties officeooo:rsid="001cf21d"/>
    </style:style>
    <style:style style:name="T5" style:family="text">
      <style:text-properties fo:font-style="normal" officeooo:rsid="001cf21d" style:font-style-asian="normal" style:font-style-complex="normal"/>
    </style:style>
    <style:style style:name="T6" style:family="text">
      <style:text-properties fo:font-style="italic" officeooo:rsid="0026a76d" style:font-style-asian="italic" style:font-style-complex="italic"/>
    </style:style>
    <style:style style:name="T7" style:family="text">
      <style:text-properties fo:font-style="normal" officeooo:rsid="0026a76d" style:font-style-asian="normal" style:font-style-complex="normal"/>
    </style:style>
    <style:style style:name="T8" style:family="text">
      <style:text-properties officeooo:rsid="00234d7b"/>
    </style:style>
    <style:style style:name="T9" style:family="text">
      <style:text-properties fo:font-style="normal" officeooo:rsid="0024fc01" style:font-style-asian="normal" style:font-style-complex="normal"/>
    </style:style>
    <style:style style:name="T10" style:family="text">
      <style:text-properties officeooo:rsid="0024fc01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super 58%" officeooo:rsid="0024fc01"/>
    </style:style>
    <style:style style:name="T15" style:family="text">
      <style:text-properties style:text-position="0% 100%" officeooo:rsid="0024fc01"/>
    </style:style>
    <style:style style:name="T16" style:family="text">
      <style:text-properties officeooo:rsid="0029319e"/>
    </style:style>
    <style:style style:name="T17" style:family="text">
      <style:text-properties fo:font-weight="normal" officeooo:rsid="0024fc01" style:font-weight-asian="normal" style:font-weight-complex="normal"/>
    </style:style>
    <style:style style:name="T18" style:family="text">
      <style:text-properties officeooo:rsid="002c01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.273cm, 0.3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.129cm, 0.1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.931cm, 0.63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1d41a" draw:marker-start-width="0.503cm" draw:marker-end-width="0.503cm" draw:fill-color="#ffffff" draw:textarea-horizontal-align="justify" draw:textarea-vertical-align="middle" draw:auto-grow-height="false" fo:min-height="2.969cm" fo:min-width="3.556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002cm" fo:min-width="3.002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1c1c1c" draw:marker-start-width="0.503cm" draw:marker-end="Arrow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101cm" fo:min-width="3.101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1c1c1c" draw:marker-start-width="0.504cm" draw:marker-end="Arrow" draw:marker-end-width="0.504cm" draw:textarea-horizontal-align="center" draw:textarea-vertical-align="middle" fo:padding-top="0.051cm" fo:padding-bottom="0.051cm" fo:padding-left="0.051cm" fo:padding-right="0.0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1c1c1c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1c1c1c" draw:marker-start-width="0.503cm" draw:marker-end="Arrow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1c1c1c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1.755cm" fo:min-width="2.053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101cm" svg:stroke-color="#81d41a" draw:marker-start-width="0.503cm" draw:marker-end-width="0.503cm" draw:fill-color="#ffffff" draw:textarea-horizontal-align="justify" draw:textarea-vertical-align="middle" draw:auto-grow-height="false" fo:min-height="1.762cm" fo:min-width="1.762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svg:stroke-color="#ea7500" draw:marker-start-width="0.503cm" draw:marker-end="Arrow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01cm" svg:stroke-color="#81d41a" draw:marker-start-width="0.503cm" draw:marker-end-width="0.503cm" draw:fill-color="#ffffff" draw:textarea-horizontal-align="justify" draw:textarea-vertical-align="middle" draw:auto-grow-height="false" fo:min-height="1.148cm" fo:min-width="1.148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101cm" svg:stroke-color="#355269" draw:marker-start-width="0.503cm" draw:marker-end="Arrow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3 – Machine à états (FSM)</text:p>
      <text:p text:style-name="P2"/>
      <text:p text:style-name="P2"/>
      <text:p text:style-name="P2">2)</text:p>
      <text:p text:style-name="P2"><draw:custom-shape text:anchor-type="paragraph" draw:z-index="3" draw:name="Forme 4" draw:style-name="gr1" draw:text-style-name="P4" svg:width="5.028cm" svg:height="4.197cm" svg:x="13.317cm" svg:y="0.46cm"><text:p text:style-name="P3">FS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1" draw:name="Forme 2" draw:style-name="gr2" draw:text-style-name="P4" svg:width="3.102cm" svg:height="3.102cm" svg:x="7.114cm" svg:y="0.104cm"><text:p text:style-name="P3">Registre 3bits</text:p><text:p text:style-name="P3"><text:span text:style-name="T1">led_counter</text:span></text:p><draw:enhanced-geometry svg:viewBox="0 0 21600 21600" draw:type="rectangle" draw:enhanced-path="M 0 0 L 21600 0 21600 21600 0 21600 0 0 Z N"/></draw:custom-shape><draw:line text:anchor-type="paragraph" draw:z-index="6" draw:name="Ligne horizontale 2" draw:style-name="gr3" draw:text-style-name="P3" svg:x1="6.223cm" svg:y1="0.462cm" svg:x2="7.114cm" svg:y2="0.462cm"><text:p text:style-name="P3">resetn <text:s text:c="10"/><text:s text:c="9"/></text:p></draw:line></text:p>
      <text:p text:style-name="P2"/>
      <text:p text:style-name="P2"/>
      <text:p text:style-name="P2"><draw:custom-shape text:anchor-type="paragraph" draw:z-index="0" draw:name="Forme 1" draw:style-name="gr4" draw:text-style-name="P6" svg:width="3.102cm" svg:height="3.102cm" svg:x="0.781cm" svg:y="0.078cm"><text:p text:style-name="P5"><text:span text:style-name="T1">Coun</text:span><text:span text:style-name="T1">ter_u</text:span><text:span text:style-name="T1">nit</text:span></text:p><draw:enhanced-geometry svg:viewBox="0 0 21600 21600" draw:type="rectangle" draw:enhanced-path="M 0 0 L 21600 0 21600 21600 0 21600 0 0 Z N"/></draw:custom-shape><draw:line text:anchor-type="paragraph" draw:z-index="8" draw:name="Ligne horizontale 3" draw:style-name="gr5" draw:text-style-name="P5" svg:x1="10.215cm" svg:y1="0.153cm" svg:x2="13.348cm" svg:y2="0.188cm"><text:p text:style-name="P3"><text:span text:style-name="T1">led_co</text:span><text:span text:style-name="T1">unter</text:span></text:p><text:p text:style-name="P3"><text:span text:style-name="T1"/></text:p></draw:line><draw:line text:anchor-type="paragraph" draw:z-index="15" draw:name="Ligne 9" draw:style-name="gr6" draw:text-style-name="P3" svg:x1="11.1cm" svg:y1="3.19cm" svg:x2="11.1cm" svg:y2="0.153cm"><text:p/></draw:line></text:p>
      <text:p text:style-name="P2"><draw:line text:anchor-type="paragraph" draw:z-index="7" draw:name="Ligne 2" draw:style-name="gr7" draw:text-style-name="P3" svg:x1="6.299cm" svg:y1="0.31cm" svg:x2="7.114cm" svg:y2="0.328cm"><text:p/></draw:line><draw:line text:anchor-type="paragraph" draw:z-index="12" draw:name="Ligne 6" draw:style-name="gr6" draw:text-style-name="P3" svg:x1="6.338cm" svg:y1="2.483cm" svg:x2="6.299cm" svg:y2="0.31cm"><text:p/></draw:line></text:p>
      <text:p text:style-name="P2"/>
      <text:p text:style-name="P2"><draw:line text:anchor-type="paragraph" draw:z-index="9" draw:name="Ligne 3" draw:style-name="gr3" draw:text-style-name="P3" svg:x1="-0.203cm" svg:y1="0.004cm" svg:x2="0.781cm" svg:y2="0.023cm"><text:p text:style-name="P3">resetn <text:s text:c="15"/><text:s text:c="4"/></text:p></draw:line></text:p>
      <text:p text:style-name="P2"><draw:line text:anchor-type="paragraph" draw:z-index="10" draw:name="Ligne 4" draw:style-name="gr8" draw:text-style-name="P5" svg:x1="3.882cm" svg:y1="0.21cm" svg:x2="5.978cm" svg:y2="0.173cm"><text:p text:style-name="P3"><text:span text:style-name="T1">end_counter</text:span></text:p><text:p text:style-name="P3"><text:span text:style-name="T1"/></text:p></draw:line><draw:line text:anchor-type="paragraph" draw:z-index="11" draw:name="Ligne 5" draw:style-name="gr6" draw:text-style-name="P3" svg:x1="5.978cm" svg:y1="1.88cm" svg:x2="5.941cm" svg:y2="0.173cm"><text:p/></draw:line><draw:line text:anchor-type="paragraph" draw:z-index="13" draw:name="Ligne 7" draw:style-name="gr6" draw:text-style-name="P3" svg:x1="5.978cm" svg:y1="1.88cm" svg:x2="5.941cm" svg:y2="0.173cm"><text:p/></draw:line><draw:line text:anchor-type="paragraph" draw:z-index="16" draw:name="Ligne 10" draw:style-name="gr8" draw:text-style-name="P3" svg:x1="10.843cm" svg:y1="0.31cm" svg:x2="11.478cm" svg:y2="0.014cm"><text:p text:style-name="P3"><text:tab/>3</text:p></draw:line><draw:line text:anchor-type="paragraph" draw:z-index="17" draw:name="Ligne 11" draw:style-name="gr8" draw:text-style-name="P3" svg:x1="6.101cm" svg:y1="0.575cm" svg:x2="6.736cm" svg:y2="0.279cm"><text:p text:style-name="P3"><text:tab/>3</text:p></draw:line></text:p>
      <text:p text:style-name="P2"><draw:custom-shape text:anchor-type="paragraph" draw:z-index="2" draw:name="Forme 3" draw:style-name="gr9" draw:text-style-name="P4" svg:width="2.153cm" svg:height="1.855cm" svg:x="7.511cm" svg:y="0.213cm"><text:p text:style-name="P3">Adder</text:p><text:p text:style-name="P3">+1</text:p><draw:enhanced-geometry svg:viewBox="0 0 21600 21600" draw:type="rectangle" draw:enhanced-path="M 0 0 L 21600 0 21600 21600 0 21600 0 0 Z N"/></draw:custom-shape></text:p>
      <text:p text:style-name="P2"><draw:line text:anchor-type="paragraph" draw:z-index="5" draw:name="Ligne 1" draw:style-name="gr7" draw:text-style-name="P3" svg:x1="11.194cm" svg:y1="0.27cm" svg:x2="9.663cm" svg:y2="0.252cm"><text:p/></draw:line><draw:line text:anchor-type="paragraph" draw:z-index="14" draw:name="Ligne 8" draw:style-name="gr6" draw:text-style-name="P3" svg:x1="6.338cm" svg:y1="0.049cm" svg:x2="7.511cm" svg:y2="0.086cm"><text:p/></draw:line></text:p>
      <text:p text:style-name="P2"><draw:line text:anchor-type="paragraph" draw:z-index="4" draw:name="Ligne horizontale 1" draw:style-name="gr7" draw:text-style-name="P3" svg:x1="5.978cm" svg:y1="0.42cm" svg:x2="7.433cm" svg:y2="0.42cm"><text:p/></draw:line></text:p>
      <text:p text:style-name="P2"/>
      <text:p text:style-name="P2"/>
      <text:p text:style-name="P7">4)</text:p>
      <text:p text:style-name="P7"/>
      <text:p text:style-name="P7"><draw:frame draw:style-name="fr1" draw:name="Image1" text:anchor-type="char" svg:width="17cm" svg:height="2.637cm" draw:z-index="29"><draw:image xlink:href="Pictures/1000000100000604000000EFC9053C33.png" xlink:type="simple" xlink:show="embed" xlink:actuate="onLoad" draw:mime-type="image/png"/></draw:frame></text:p>
      <text:p text:style-name="P7">En vert les signaux tu testbench et en rose les signaux internes au <text:span text:style-name="T1">tp_fsm.</text:span></text:p>
      <text:p text:style-name="P8">end_counter<text:span text:style-name="T2"> est à 1 pendant un cycle d’horloge tous les 20 cycles.</text:span></text:p>
      <text:p text:style-name="P9">Lorsque celui-ci est à 1, <text:span text:style-name="T1">led_reg </text:span>et <text:span text:style-name="T1">led</text:span> changement d’état. Le compteur de led s’incrémente également.</text:p>
      <text:p text:style-name="P8">counter_led<text:span text:style-name="T2"> compte le nombre de pulsation de </text:span>end_counter. <text:span text:style-name="T2">Lorsqu’il arrive à 5, soit 6 changement d’état de la led, il se remet à 0.</text:span></text:p>
      <text:p text:style-name="P9">À 5100ns on envoi un reset pour tester la remise à 0 de l’architecture.</text:p>
      <text:p text:style-name="P10"><draw:custom-shape text:anchor-type="paragraph" draw:z-index="18" draw:name="Forme 5" draw:style-name="gr10" draw:text-style-name="P4" svg:width="1.763cm" svg:height="1.763cm" svg:x="7.112cm" svg:y="0.24cm"><text:p text:style-name="P3">state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5)</text:p>
      <text:p text:style-name="P10"><draw:line text:anchor-type="paragraph" draw:z-index="26" draw:name="Ligne verticale 5" draw:style-name="gr11" draw:text-style-name="P3" svg:x1="8.874cm" svg:y1="0.411cm" svg:x2="12.361cm" svg:y2="7.735cm"><text:p text:style-name="P3">3 clignotements</text:p><text:p text:style-name="P3"/></draw:line><draw:line text:anchor-type="paragraph" draw:z-index="28" draw:name="Ligne verticale 7" draw:style-name="gr11" draw:text-style-name="P3" svg:x1="3.334cm" svg:y1="7.45cm" svg:x2="7.112cm" svg:y2="0.393cm"><text:p text:style-name="P3">3 clignotements</text:p><text:p text:style-name="P3"/></draw:line></text:p>
      <text:p text:style-name="P10"><draw:custom-shape text:anchor-type="paragraph" draw:z-index="19" draw:name="Forme 6" draw:style-name="gr12" draw:text-style-name="P4" svg:width="1.763cm" svg:height="1.763cm" svg:x="7.112cm" svg:y="4.447cm"><text:p text:style-name="P3">id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 7" draw:style-name="gr12" draw:text-style-name="P4" svg:width="1.763cm" svg:height="1.763cm" svg:x="11.712cm" svg:y="7.248cm"><text:p text:style-name="P3">state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e 9" draw:style-name="gr12" draw:text-style-name="P4" svg:width="1.763cm" svg:height="1.763cm" svg:x="2.602cm" svg:y="6.964cm"><text:p text:style-name="P3">state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Ligne verticale 1" draw:style-name="gr13" draw:text-style-name="P3" svg:x1="8.343cm" svg:y1="0.469cm" svg:x2="8.343cm" svg:y2="4.447cm"><text:p text:style-name="P3">resetn</text:p><text:p text:style-name="P3"/></draw:line><draw:line text:anchor-type="paragraph" draw:z-index="23" draw:name="Ligne verticale 2" draw:style-name="gr13" draw:text-style-name="P3" svg:x1="4.276cm" svg:y1="7.382cm" svg:x2="7.112cm" svg:y2="5.694cm"><text:p text:style-name="P3">resetn</text:p><text:p text:style-name="P3"/></draw:line><draw:line text:anchor-type="paragraph" draw:z-index="24" draw:name="Ligne verticale 3" draw:style-name="gr13" draw:text-style-name="P3" svg:x1="11.832cm" svg:y1="7.613cm" svg:x2="8.756cm" svg:y2="5.81cm"><text:p text:style-name="P3">resetn</text:p><text:p text:style-name="P3"/></draw:line><draw:line text:anchor-type="paragraph" draw:z-index="25" draw:name="Ligne verticale 4" draw:style-name="gr11" draw:text-style-name="P3" svg:x1="7.682cm" svg:y1="4.34cm" svg:x2="7.698cm" svg:y2="0.542cm"><text:p text:style-name="P3">3 clignotements</text:p><text:p text:style-name="P3"/></draw:line><draw:line text:anchor-type="paragraph" draw:z-index="27" draw:name="Ligne verticale 6" draw:style-name="gr11" draw:text-style-name="P3" svg:x1="11.712cm" svg:y1="8.34cm" svg:x2="4.364cm" svg:y2="8.026cm"><text:p text:style-name="P3">3 clignotements</text:p><text:p text:style-name="P3"/></draw:line></text:p>
      <text:p text:style-name="P11"/>
      <text:p text:style-name="P12">6)</text:p>
      <text:p text:style-name="P12">Les signaux d’entrée sont : <text:span text:style-name="T3">clk</text:span><text:span text:style-name="T4"> et </text:span><text:span text:style-name="T3">resetn</text:span></text:p>
      <text:p text:style-name="P12">Les signaux internes sont : <text:span text:style-name="T3">current_state, next_state, end_counter, counter_led </text:span><text:span text:style-name="T5">et </text:span><text:span text:style-name="T3">led_reg</text:span></text:p>
      <text:p text:style-name="P12">Les signaux de sortie sont : <text:span text:style-name="T3">led</text:span><text:span text:style-name="T6">0_b, led0_g </text:span><text:span text:style-name="T7">et </text:span><text:span text:style-name="T6">led0_r</text:span></text:p>
      <text:p text:style-name="P13"/>
      <text:p text:style-name="P14"><text:span text:style-name="T8">8</text:span>)</text:p>
      <text:p text:style-name="P14"/>
      <text:p text:style-name="P14"><draw:frame draw:style-name="fr1" draw:name="Image2" text:anchor-type="char" svg:width="17cm" svg:height="3.923cm" draw:z-index="30"><draw:image xlink:href="Pictures/100000010000060200000163841217A2.png" xlink:type="simple" xlink:show="embed" xlink:actuate="onLoad" draw:mime-type="image/png"/></draw:frame></text:p>
      <text:p text:style-name="P14"/>
      <text:p text:style-name="P15">current_state <text:span text:style-name="T9">et </text:span><text:span text:style-name="T10">next_state </text:span><text:span text:style-name="T2">commen</text:span><text:span text:style-name="T9">cent</text:span><text:span text:style-name="T2"> bien à idle après le reset.</text:span></text:p>
      <text:p text:style-name="P16">Au 5<text:span text:style-name="T11">ème</text:span><text:span text:style-name="T12"> changement de la led, </text:span><text:span text:style-name="T13">next_state</text:span><text:span text:style-name="T12"> passe à state1</text:span></text:p>
      <text:p text:style-name="P17"><text:span text:style-name="T10">Au 6</text:span><text:span text:style-name="T14">ème</text:span><text:span text:style-name="T15"> changement de la led,</text:span><text:span text:style-name="T12"> </text:span><text:span text:style-name="T1">current_state </text:span>passe à state1.</text:p>
      <text:p text:style-name="P16">La led a donc bien clignoté 3 fois, soit 3 fois à 0 et 3 fois à 1.</text:p>
      <text:p text:style-name="P17">On voit que la séquence d’état est correct : idle, stat1, state2, state3, state1, …</text:p>
      <text:p text:style-name="P17">Pour chaque état la led clignote 3 fois.</text:p>
      <text:p text:style-name="P17">Le reset à <text:span text:style-name="T16">52</text:span>00ns permet de vérifier la remise à 0.</text:p>
      <text:p text:style-name="P15">current_state <text:span text:style-name="T2">et</text:span> next_state <text:span text:style-name="T2">sont ramenés à idle.</text:span></text:p>
      <text:p text:style-name="P18">En bleu les 3 signaux de led clignotent 3 fois par état. Ils suivent la séquence de couleur blanc, rouge, bleu, vert, rouge, …</text:p>
      <text:p text:style-name="P18">Le reset à 5200ns remets 3 signaux de led à la couleur blanche.</text:p>
      <text:p text:style-name="P19"/>
      <text:p text:style-name="P19"/>
      <text:p text:style-name="P20">9) </text:p>
      <text:p text:style-name="P20"><draw:frame draw:style-name="fr2" draw:name="Image3" text:anchor-type="char" svg:y="0.365cm" svg:width="16.886cm" svg:height="2.3cm" draw:z-index="31"><draw:image xlink:href="Pictures/1000000100000602000000DCAEBA6ECC.png" xlink:type="simple" xlink:show="embed" xlink:actuate="onLoad" draw:mime-type="image/png"/></draw:frame></text:p>
      <text:p text:style-name="P21">Les entrées <text:span text:style-name="T1">clk </text:span>et <text:span text:style-name="T1">resetn </text:span>à gauche.</text:p>
      <text:p text:style-name="P21">En cyan à gauche <text:span text:style-name="T1">counter_unit.</text:span></text:p>
      <text:p text:style-name="P21">En bleu foncé à gauche, Les registres et LUT du compteur de led</text:p>
      <text:p text:style-name="P21">En rose les registres et LUT de la machine d’état. Ceux-ci stockes et manipule <text:span text:style-name="T1">current_state.</text:span></text:p>
      <text:p text:style-name="P21">En bleu claire à droite, la LUT et le registre de <text:span text:style-name="T1">led_reg</text:span>.</text:p>
      <text:p text:style-name="P21">En orange à droite, les 3 LUT des 3 signaux de led : <text:span text:style-name="T1">led0_b, led0_g </text:span>et <text:span text:style-name="T1">led0_r.</text:span></text:p>
      <text:p text:style-name="P22"/>
      <text:p text:style-name="P23"><draw:frame draw:style-name="fr3" draw:name="Image7" text:anchor-type="char" svg:y="0.092cm" svg:width="5.369cm" svg:height="4.374cm" draw:z-index="35"><draw:image xlink:href="Pictures/1000000100000133000000FA99F8190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0"/>
      <text:p text:style-name="P20"/>
      <text:p text:style-name="P20"/>
      <text:p text:style-name="P20"/>
      <text:p text:style-name="P24"/>
      <text:p text:style-name="P25">Pour l’exercice, j’ai réduit le <text:span text:style-name="T1">threshold </text:span>à 20. Le <text:span text:style-name="T1">counter_time </text:span>a besoin de 5 bits pour compter jusqu’à 20. 5 registres sont donc alloués à <text:span text:style-name="T1">counter_time.</text:span></text:p>
      <text:p text:style-name="P25">2 registres sont alloués à <text:span text:style-name="T1">current_state </text:span><text:s/>pour lui permettre de stocker 4 états.</text:p>
      <text:p text:style-name="P25">Il y a un registre pour <text:span text:style-name="T1">led_reg.</text:span></text:p>
      <text:p text:style-name="P25">Le compteur de led à besoin de 3 registres pour compter jusqu’à 5.</text:p>
      <text:p text:style-name="P25">On retrouve bien les 11 registres affichés dans le rapport de synthèse.</text:p>
      <text:p text:style-name="P25"/>
      <text:p text:style-name="P26">Il y a 3 buffers de sortie pour <text:span text:style-name="T1">led0_b, led0_g, led0_r </text:span>et 2 buffers d’entrée pour <text:span text:style-name="T1">resetn </text:span>et <text:span text:style-name="T1">clk.</text:span></text:p>
      <text:p text:style-name="P27">L’horloge a aussi un buffer spécial.</text:p>
      <text:p text:style-name="P27"/>
      <text:p text:style-name="P27">Le rapport nous montre que 15 LUT sont utilisées.</text:p>
      <text:p text:style-name="P27">Il y a une LUT par registre soit 11 LUT, une LUT pour chacune des 3 sortie et une LUT pour la sortie de <text:span text:style-name="T1">counter_time.</text:span></text:p>
      <text:p text:style-name="P27">Vivado adapte la taille des LUT en fonction du besoin, d’où les 5 tailles différentes.</text:p>
      <text:p text:style-name="P27"><draw:frame draw:style-name="fr4" draw:name="Image8" text:anchor-type="char" svg:y="0.37cm" svg:width="8.086cm" svg:height="4.189cm" draw:z-index="36"><draw:image xlink:href="Pictures/10000001000001BC000000E668BAA1C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Pourtant seulement 8 « Slice LUTs » sont utilisées.</text:p>
      <text:p text:style-name="P28">Après avoir regardé la documentation du Zynq-7000, je pense comprendre que chaque slice a 4 LUT. Chacune d’elles peut être utilisée comme une seule LUT6 ou comme 2 LUT5.</text:p>
      <text:p text:style-name="P28">Lors de la synthèse, Vivado utilise donc 15 LUT5 réparties sur 2 slices.</text:p>
      <text:p text:style-name="P28">Dans le rapport d’utilisation des slices, ne s’affichent que les LUT6 utilisées, donc seulement 8 LUT des 2 slices.</text:p>
      <text:p text:style-name="P29">Les LUT sont en réalité utilisées comme des LUT5 et non des LUT6. On ne peut voir cela que dans les détails d’utilisation des LUT aux point « 7.Primitive » du rapport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<draw:frame draw:style-name="fr4" draw:name="Image9" text:anchor-type="char" svg:y="0.086cm" svg:width="9.571cm" svg:height="4.676cm" draw:z-index="37"><draw:image xlink:href="Pictures/10000001000002C000000158C0699ABA.png" xlink:type="simple" xlink:show="embed" xlink:actuate="onLoad" draw:mime-type="image/png"/></draw:frame><text:soft-page-break/></text:p>
      <text:p text:style-name="P28"/>
      <text:p text:style-name="P30"/>
      <text:p text:style-name="P28"/>
      <text:p text:style-name="P20"/>
      <text:p text:style-name="P20"/>
      <text:p text:style-name="P20"/>
      <text:p text:style-name="P20"/>
      <text:p text:style-name="P20"/>
      <text:p text:style-name="P30"/>
      <text:p text:style-name="P30">Les LUT sont à gauche des slices et les registres à droite.</text:p>
      <text:p text:style-name="P20"/>
      <text:p text:style-name="P20">10)</text:p>
      <text:p text:style-name="P31">Dans le fichier de contrainte, on configure l’horloge à 100MHz.</text:p>
      <text:p text:style-name="P32">set_property -dict { PACKAGE_PIN H16 <text:s text:c="2"/>IOSTANDARD LVCMOS33 } [get_ports { clk }];</text:p>
      <text:p text:style-name="P32">create_clock -add -name sys_clk_pin -period 10.00 -waveform {0 4} [get_ports { clk }];</text:p>
      <text:p text:style-name="P32"/>
      <text:p text:style-name="P31">On connecte les 3 signaux de LED aux sorties de notre architecture.</text:p>
      <text:p text:style-name="P33">set_property -dict { PACKAGE_PIN L15 <text:s text:c="2"/>IOSTANDARD LVCMOS33 } [get_ports { led0_b }];</text:p>
      <text:p text:style-name="P33">set_property -dict { PACKAGE_PIN G17 <text:s text:c="2"/>IOSTANDARD LVCMOS33 } [get_ports { led0_g }];</text:p>
      <text:p text:style-name="P32">set_property -dict { PACKAGE_PIN N15 <text:s text:c="2"/>IOSTANDARD LVCMOS33 } [get_ports { led0_r }];</text:p>
      <text:p text:style-name="P32"/>
      <text:p text:style-name="P31">On connecte un bouton au signal d’entrée <text:span text:style-name="T1">resetn</text:span>.</text:p>
      <text:p text:style-name="P34"><text:span text:style-name="T17">set_property -dict { PACKAGE_PIN D20 <text:s text:c="2"/>IOSTANDARD LVCMOS33 } [get_ports { resetn }]</text:span>;</text:p>
      <text:p text:style-name="Text_20_body"/>
      <text:p text:style-name="P35">11)</text:p>
      <text:p text:style-name="P21"><draw:frame draw:style-name="fr5" draw:name="Image4" text:anchor-type="char" svg:width="17cm" svg:height="4.099cm" draw:z-index="32"><draw:image xlink:href="Pictures/100000010000036B000000D3128ED1AD.png" xlink:type="simple" xlink:show="embed" xlink:actuate="onLoad" draw:mime-type="image/png"/></draw:frame></text:p>
      <text:p text:style-name="P21">Le TNS et le THS sont à 0ns.</text:p>
      <text:p text:style-name="P21"/>
      <text:p text:style-name="P21"><draw:frame draw:style-name="fr1" draw:name="Image5" text:anchor-type="char" svg:width="17cm" svg:height="0.847cm" draw:z-index="33"><draw:image xlink:href="Pictures/10000001000003FE00000033D5B18EB6.png" xlink:type="simple" xlink:show="embed" xlink:actuate="onLoad" draw:mime-type="image/png"/></draw:frame></text:p>
      <text:p text:style-name="P21">Le chemin critique a un slack de 7, <text:span text:style-name="T18">714 ns et un délai 2,060ns. La période de l’horloge étant de 10ns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6" draw:name="Image6" text:anchor-type="char" svg:y="0cm" svg:width="11.954cm" svg:height="5.405cm" draw:z-index="34"><draw:image xlink:href="Pictures/100000010000053C0000026640E71EE6.png" xlink:type="simple" xlink:show="embed" xlink:actuate="onLoad" draw:mime-type="image/png"/></draw:frame><text:soft-page-break/></text:p>
      <text:p text:style-name="Text_20_body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Le chemin critique provient d’un registre de <text:span text:style-name="T1">counter_time </text:span>et arrive à un registre de la machine d’état.</text:p>
      <text:p text:style-name="P37">Lorsqu’il sort de <text:span text:style-name="T1">counter_time, </text:span>le chemin critique correspond au signal <text:span text:style-name="T1">end_counter.</text:span></text:p>
      <text:p text:style-name="P38"/>
      <text:p text:style-name="P39">12) Le bitstream est généré sans erreur mais je n’ai pas la carte pour tester l’architec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7T10:17:36.274409957</meta:creation-date>
    <dc:date>2026-07-08T17:38:11.637120424</dc:date>
    <meta:editing-duration>PT12H46M12S</meta:editing-duration>
    <meta:editing-cycles>23</meta:editing-cycles>
    <meta:generator>LibreOffice/26.2.4.2$Linux_X86_64 LibreOffice_project/3346a99e6b841765b75a9b29714a5b95c6761ce3</meta:generator>
    <meta:document-statistic meta:table-count="0" meta:image-count="9" meta:object-count="0" meta:page-count="5" meta:paragraph-count="63" meta:word-count="752" meta:character-count="4200" meta:non-whitespace-character-count="3498"/>
  </office:meta>
</office:document-meta>
</file>